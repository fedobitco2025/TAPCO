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tr" fo:country="TR" style:language-complex="ar" style:country-complex="AE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language="tr" fo:country="TR" style:language-complex="ar" style:country-complex="SA"/>
    </style:style>
    <style:style style:name="T9" style:parent-style-name="DefaultParagraphFont" style:family="text">
      <style:text-properties fo:language="tr" fo:country="TR" style:language-complex="ar" style:country-complex="AE"/>
    </style:style>
    <style:style style:name="P10" style:parent-style-name="Standard" style:list-style-name="LFO1" style:family="paragraph">
      <style:paragraph-properties style:writing-mode="rl-tb"/>
    </style:style>
    <style:style style:name="T11" style:parent-style-name="DefaultParagraphFont" style:family="text">
      <style:text-properties fo:language="tr" fo:country="TR" style:language-complex="ar" style:country-complex="SA"/>
    </style:style>
    <style:style style:name="P12" style:parent-style-name="Standard" style:list-style-name="LFO1" style:family="paragraph">
      <style:paragraph-properties style:writing-mode="rl-tb"/>
    </style:style>
    <style:style style:name="T13" style:parent-style-name="DefaultParagraphFont" style:family="text">
      <style:text-properties fo:language="tr" fo:country="TR" style:language-complex="ar" style:country-complex="SA"/>
    </style:style>
    <style:style style:name="P14" style:parent-style-name="Standard" style:list-style-name="LFO1" style:family="paragraph">
      <style:paragraph-properties style:writing-mode="rl-tb"/>
    </style:style>
    <style:style style:name="T15" style:parent-style-name="DefaultParagraphFont" style:family="text">
      <style:text-properties fo:language="tr" fo:country="TR" style:language-complex="ar" style:country-complex="SA"/>
    </style:style>
    <style:style style:name="P16" style:parent-style-name="Standard" style:list-style-name="LFO1" style:family="paragraph">
      <style:paragraph-properties style:writing-mode="rl-tb"/>
    </style:style>
    <style:style style:name="T17" style:parent-style-name="DefaultParagraphFont" style:family="text">
      <style:text-properties fo:language="tr" fo:country="TR" style:language-complex="ar" style:country-complex="SA"/>
    </style:style>
    <style:style style:name="P18" style:parent-style-name="Standard" style:list-style-name="LFO1" style:family="paragraph">
      <style:paragraph-properties style:writing-mode="rl-tb"/>
    </style:style>
    <style:style style:name="T19" style:parent-style-name="DefaultParagraphFont" style:family="text">
      <style:text-properties fo:language="tr" fo:country="TR" style:language-complex="ar" style:country-complex="SA"/>
    </style:style>
    <style:style style:name="P20" style:parent-style-name="Standard" style:list-style-name="LFO1" style:family="paragraph">
      <style:paragraph-properties style:writing-mode="rl-tb"/>
    </style:style>
    <style:style style:name="T21" style:parent-style-name="DefaultParagraphFont" style:family="text">
      <style:text-properties fo:language="tr" fo:country="TR" style:language-complex="ar" style:country-complex="SA"/>
    </style:style>
    <style:style style:name="P22" style:parent-style-name="Standard" style:family="paragraph">
      <style:paragraph-properties style:writing-mode="rl-tb"/>
    </style:style>
    <style:style style:name="T23" style:parent-style-name="DefaultParagraphFont" style:family="text">
      <style:text-properties fo:language="tr" fo:country="TR" style:language-complex="ar" style:country-complex="SA"/>
    </style:style>
    <style:style style:name="T2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5" style:parent-style-name="DefaultParagraphFont" style:family="text">
      <style:text-properties fo:language="tr" fo:country="TR" style:language-complex="ar" style:country-complex="AE"/>
    </style:style>
    <style:style style:name="P26" style:parent-style-name="Standard" style:family="paragraph">
      <style:paragraph-properties style:writing-mode="rl-tb"/>
    </style:style>
    <style:style style:name="T27" style:parent-style-name="DefaultParagraphFont" style:family="text">
      <style:text-properties fo:language="tr" fo:country="TR" style:language-complex="ar" style:country-complex="SA"/>
    </style:style>
    <style:style style:name="T28" style:parent-style-name="DefaultParagraphFont" style:family="text">
      <style:text-properties fo:language="tr" fo:country="TR" style:language-complex="ar" style:country-complex="AE"/>
    </style:style>
    <style:style style:name="P29" style:parent-style-name="Standard" style:family="paragraph">
      <style:paragraph-properties style:writing-mode="rl-tb"/>
    </style:style>
    <style:style style:name="T3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3" style:parent-style-name="Standard" style:family="paragraph">
      <style:paragraph-properties style:writing-mode="rl-tb"/>
    </style:style>
    <style:style style:name="T34" style:parent-style-name="DefaultParagraphFont" style:family="text">
      <style:text-properties fo:language="tr" fo:country="TR" style:language-complex="ar" style:country-complex="SA"/>
    </style:style>
    <style:style style:name="T35" style:parent-style-name="DefaultParagraphFont" style:family="text">
      <style:text-properties fo:language="tr" fo:country="TR" style:language-complex="ar" style:country-complex="AE"/>
    </style:style>
    <style:style style:name="P36" style:parent-style-name="Standard" style:family="paragraph">
      <style:paragraph-properties style:writing-mode="rl-tb"/>
    </style:style>
    <style:style style:name="T37" style:parent-style-name="DefaultParagraphFont" style:family="text">
      <style:text-properties style:font-name="Segoe UI Emoji" style:font-name-complex="Segoe UI Emoji" fo:language="tr" fo:country="TR" style:language-complex="ar" style:country-complex="AE"/>
    </style:style>
    <style:style style:name="T38" style:parent-style-name="DefaultParagraphFont" style:family="text">
      <style:text-properties fo:language="tr" fo:country="TR" style:language-complex="ar" style:country-complex="AE"/>
    </style:style>
    <style:style style:name="T39" style:parent-style-name="DefaultParagraphFont" style:family="text">
      <style:text-properties fo:language="tr" fo:country="TR" style:language-complex="ar" style:country-complex="SA"/>
    </style:style>
    <style:style style:name="T40" style:parent-style-name="DefaultParagraphFont" style:family="text">
      <style:text-properties fo:language="tr" fo:country="TR" style:language-complex="ar" style:country-complex="AE"/>
    </style:style>
    <style:style style:name="T4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42" style:parent-style-name="DefaultParagraphFont" style:family="text">
      <style:text-properties fo:language="tr" fo:country="TR" style:language-complex="ar" style:country-complex="AE"/>
    </style:style>
    <style:style style:name="T43" style:parent-style-name="DefaultParagraphFont" style:family="text">
      <style:text-properties fo:language="tr" fo:country="TR" style:language-complex="ar" style:country-complex="SA"/>
    </style:style>
    <style:style style:name="P44" style:parent-style-name="Standard" style:family="paragraph">
      <style:paragraph-properties style:writing-mode="rl-tb"/>
    </style:style>
    <style:style style:name="T45" style:parent-style-name="DefaultParagraphFont" style:family="text">
      <style:text-properties fo:language="tr" fo:country="TR" style:language-complex="ar" style:country-complex="SA"/>
    </style:style>
    <style:style style:name="T46" style:parent-style-name="DefaultParagraphFont" style:family="text">
      <style:text-properties fo:language="tr" fo:country="TR" style:language-complex="ar" style:country-complex="AE"/>
    </style:style>
    <style:style style:name="P47" style:parent-style-name="Standard" style:family="paragraph">
      <style:paragraph-properties style:writing-mode="rl-tb"/>
    </style:style>
    <style:style style:name="T4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5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52" style:parent-style-name="Standard" style:family="paragraph">
      <style:paragraph-properties style:writing-mode="rl-tb"/>
    </style:style>
    <style:style style:name="T5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6" style:parent-style-name="Standard" style:family="paragraph">
      <style:paragraph-properties style:writing-mode="rl-tb"/>
    </style:style>
    <style:style style:name="T5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60" style:parent-style-name="Standard" style:family="paragraph">
      <style:paragraph-properties style:writing-mode="rl-tb"/>
    </style:style>
    <style:style style:name="T6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6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65" style:parent-style-name="Standard" style:family="paragraph">
      <style:paragraph-properties style:writing-mode="rl-tb"/>
    </style:style>
    <style:style style:name="T66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6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6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69" style:parent-style-name="Standard" style:family="paragraph">
      <style:paragraph-properties style:writing-mode="rl-tb"/>
    </style:style>
    <style:style style:name="T70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7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73" style:parent-style-name="Standard" style:family="paragraph">
      <style:paragraph-properties style:writing-mode="rl-tb"/>
    </style:style>
    <style:style style:name="T74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7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7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77" style:parent-style-name="Standard" style:family="paragraph">
      <style:paragraph-properties style:writing-mode="rl-tb"/>
    </style:style>
    <style:style style:name="T7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7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8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8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82" style:parent-style-name="Standard" style:family="paragraph">
      <style:paragraph-properties style:writing-mode="rl-tb"/>
    </style:style>
    <style:style style:name="T83" style:parent-style-name="DefaultParagraphFont" style:family="text">
      <style:text-properties fo:language="tr" fo:country="TR" style:language-complex="ar" style:country-complex="SA"/>
    </style:style>
    <style:style style:name="T84" style:parent-style-name="DefaultParagraphFont" style:family="text">
      <style:text-properties fo:language="tr" fo:country="TR" style:language-complex="ar" style:country-complex="AE"/>
    </style:style>
    <style:style style:name="P85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86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87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88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89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90" style:parent-style-name="Standard" style:list-style-name="LFO2" style:family="paragraph">
      <style:paragraph-properties style:writing-mode="rl-tb"/>
      <style:text-properties fo:language="tr" fo:country="TR" style:language-complex="ar" style:country-complex="AE"/>
    </style:style>
    <style:style style:name="P91" style:parent-style-name="Standard" style:family="paragraph">
      <style:paragraph-properties style:writing-mode="rl-tb"/>
    </style:style>
    <style:style style:name="T92" style:parent-style-name="DefaultParagraphFont" style:family="text">
      <style:text-properties fo:language="tr" fo:country="TR" style:language-complex="ar" style:country-complex="SA"/>
    </style:style>
    <style:style style:name="T93" style:parent-style-name="DefaultParagraphFont" style:family="text">
      <style:text-properties fo:language="tr" fo:country="TR" style:language-complex="ar" style:country-complex="AE"/>
    </style:style>
    <style:style style:name="P94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9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96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97" style:parent-style-name="Standard" style:family="paragraph">
      <style:paragraph-properties style:writing-mode="rl-tb"/>
    </style:style>
    <style:style style:name="T9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9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0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01" style:parent-style-name="Standard" style:family="paragraph">
      <style:paragraph-properties style:writing-mode="rl-tb"/>
    </style:style>
    <style:style style:name="T102" style:parent-style-name="DefaultParagraphFont" style:family="text">
      <style:text-properties fo:language="tr" fo:country="TR" style:language-complex="ar" style:country-complex="SA"/>
    </style:style>
    <style:style style:name="T103" style:parent-style-name="DefaultParagraphFont" style:family="text">
      <style:text-properties fo:language="tr" fo:country="TR" style:language-complex="ar" style:country-complex="AE"/>
    </style:style>
    <style:style style:name="P104" style:parent-style-name="Standard" style:list-style-name="LFO3" style:family="paragraph">
      <style:paragraph-properties style:writing-mode="rl-tb"/>
    </style:style>
    <style:style style:name="T105" style:parent-style-name="DefaultParagraphFont" style:family="text">
      <style:text-properties fo:language="tr" fo:country="TR" style:language-complex="ar" style:country-complex="SA"/>
    </style:style>
    <style:style style:name="P106" style:parent-style-name="Standard" style:list-style-name="LFO3" style:family="paragraph">
      <style:paragraph-properties style:writing-mode="rl-tb"/>
    </style:style>
    <style:style style:name="T107" style:parent-style-name="DefaultParagraphFont" style:family="text">
      <style:text-properties fo:language="tr" fo:country="TR" style:language-complex="ar" style:country-complex="SA"/>
    </style:style>
    <style:style style:name="T108" style:parent-style-name="DefaultParagraphFont" style:family="text">
      <style:text-properties fo:language="tr" fo:country="TR" style:language-complex="ar" style:country-complex="AE"/>
    </style:style>
    <style:style style:name="P109" style:parent-style-name="Standard" style:list-style-name="LFO3" style:family="paragraph">
      <style:paragraph-properties style:writing-mode="rl-tb"/>
    </style:style>
    <style:style style:name="T110" style:parent-style-name="DefaultParagraphFont" style:family="text">
      <style:text-properties fo:language="tr" fo:country="TR" style:language-complex="ar" style:country-complex="SA"/>
    </style:style>
    <style:style style:name="T111" style:parent-style-name="DefaultParagraphFont" style:family="text">
      <style:text-properties fo:language="tr" fo:country="TR" style:language-complex="ar" style:country-complex="AE"/>
    </style:style>
    <style:style style:name="P112" style:parent-style-name="Standard" style:list-style-name="LFO3" style:family="paragraph">
      <style:paragraph-properties style:writing-mode="rl-tb"/>
    </style:style>
    <style:style style:name="T113" style:parent-style-name="DefaultParagraphFont" style:family="text">
      <style:text-properties fo:language="tr" fo:country="TR" style:language-complex="ar" style:country-complex="SA"/>
    </style:style>
    <style:style style:name="T114" style:parent-style-name="DefaultParagraphFont" style:family="text">
      <style:text-properties fo:language="tr" fo:country="TR" style:language-complex="ar" style:country-complex="AE"/>
    </style:style>
    <style:style style:name="P115" style:parent-style-name="Standard" style:list-style-name="LFO3" style:family="paragraph">
      <style:paragraph-properties style:writing-mode="rl-tb"/>
    </style:style>
    <style:style style:name="T116" style:parent-style-name="DefaultParagraphFont" style:family="text">
      <style:text-properties fo:language="tr" fo:country="TR" style:language-complex="ar" style:country-complex="SA"/>
    </style:style>
    <style:style style:name="T117" style:parent-style-name="DefaultParagraphFont" style:family="text">
      <style:text-properties fo:language="tr" fo:country="TR" style:language-complex="ar" style:country-complex="AE"/>
    </style:style>
    <style:style style:name="P118" style:parent-style-name="Standard" style:family="paragraph">
      <style:paragraph-properties style:writing-mode="rl-tb"/>
    </style:style>
    <style:style style:name="T119" style:parent-style-name="DefaultParagraphFont" style:family="text">
      <style:text-properties fo:language="tr" fo:country="TR" style:language-complex="ar" style:country-complex="SA"/>
    </style:style>
    <style:style style:name="T120" style:parent-style-name="DefaultParagraphFont" style:family="text">
      <style:text-properties fo:language="tr" fo:country="TR" style:language-complex="ar" style:country-complex="AE"/>
    </style:style>
    <style:style style:name="P121" style:parent-style-name="Standard" style:family="paragraph">
      <style:paragraph-properties style:writing-mode="rl-tb"/>
    </style:style>
    <style:style style:name="T12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23" style:parent-style-name="Standard" style:family="paragraph">
      <style:paragraph-properties style:writing-mode="rl-tb"/>
    </style:style>
    <style:style style:name="T124" style:parent-style-name="DefaultParagraphFont" style:family="text">
      <style:text-properties fo:language="tr" fo:country="TR" style:language-complex="ar" style:country-complex="SA"/>
    </style:style>
    <style:style style:name="T125" style:parent-style-name="DefaultParagraphFont" style:family="text">
      <style:text-properties fo:language="tr" fo:country="TR" style:language-complex="ar" style:country-complex="AE"/>
    </style:style>
    <style:style style:name="T126" style:parent-style-name="DefaultParagraphFont" style:family="text">
      <style:text-properties fo:language="tr" fo:country="TR" style:language-complex="ar" style:country-complex="SA"/>
    </style:style>
    <style:style style:name="T127" style:parent-style-name="DefaultParagraphFont" style:family="text">
      <style:text-properties fo:language="tr" fo:country="TR" style:language-complex="ar" style:country-complex="AE"/>
    </style:style>
    <style:style style:name="T128" style:parent-style-name="DefaultParagraphFont" style:family="text">
      <style:text-properties fo:language="tr" fo:country="TR" style:language-complex="ar" style:country-complex="SA"/>
    </style:style>
    <style:style style:name="T129" style:parent-style-name="DefaultParagraphFont" style:family="text">
      <style:text-properties fo:language="tr" fo:country="TR" style:language-complex="ar" style:country-complex="AE"/>
    </style:style>
    <style:style style:name="P130" style:parent-style-name="Standard" style:family="paragraph">
      <style:paragraph-properties style:writing-mode="rl-tb"/>
    </style:style>
    <style:style style:name="T131" style:parent-style-name="DefaultParagraphFont" style:family="text">
      <style:text-properties fo:language="tr" fo:country="TR" style:language-complex="ar" style:country-complex="SA"/>
    </style:style>
    <style:style style:name="T132" style:parent-style-name="DefaultParagraphFont" style:family="text">
      <style:text-properties fo:language="tr" fo:country="TR" style:language-complex="ar" style:country-complex="AE"/>
    </style:style>
    <style:style style:name="P133" style:parent-style-name="Standard" style:family="paragraph">
      <style:paragraph-properties style:writing-mode="rl-tb"/>
    </style:style>
    <style:style style:name="T134" style:parent-style-name="DefaultParagraphFont" style:family="text">
      <style:text-properties fo:language="tr" fo:country="TR" style:language-complex="ar" style:country-complex="SA"/>
    </style:style>
    <style:style style:name="T135" style:parent-style-name="DefaultParagraphFont" style:family="text">
      <style:text-properties fo:language="tr" fo:country="TR" style:language-complex="ar" style:country-complex="AE"/>
    </style:style>
    <style:style style:name="T136" style:parent-style-name="DefaultParagraphFont" style:family="text">
      <style:text-properties fo:language="tr" fo:country="TR" style:language-complex="ar" style:country-complex="SA"/>
    </style:style>
    <style:style style:name="T137" style:parent-style-name="DefaultParagraphFont" style:family="text">
      <style:text-properties fo:language="tr" fo:country="TR" style:language-complex="ar" style:country-complex="AE"/>
    </style:style>
    <style:style style:name="T138" style:parent-style-name="DefaultParagraphFont" style:family="text">
      <style:text-properties fo:language="tr" fo:country="TR" style:language-complex="ar" style:country-complex="SA"/>
    </style:style>
    <style:style style:name="T139" style:parent-style-name="DefaultParagraphFont" style:family="text">
      <style:text-properties fo:language="tr" fo:country="TR" style:language-complex="ar" style:country-complex="AE"/>
    </style:style>
    <style:style style:name="T140" style:parent-style-name="DefaultParagraphFont" style:family="text">
      <style:text-properties fo:language="tr" fo:country="TR" style:language-complex="ar" style:country-complex="SA"/>
    </style:style>
    <style:style style:name="T141" style:parent-style-name="DefaultParagraphFont" style:family="text">
      <style:text-properties fo:language="tr" fo:country="TR" style:language-complex="ar" style:country-complex="AE"/>
    </style:style>
    <style:style style:name="T142" style:parent-style-name="DefaultParagraphFont" style:family="text">
      <style:text-properties fo:language="tr" fo:country="TR" style:language-complex="ar" style:country-complex="SA"/>
    </style:style>
    <style:style style:name="T143" style:parent-style-name="DefaultParagraphFont" style:family="text">
      <style:text-properties fo:language="tr" fo:country="TR" style:language-complex="ar" style:country-complex="SA"/>
    </style:style>
    <style:style style:name="T144" style:parent-style-name="DefaultParagraphFont" style:family="text">
      <style:text-properties fo:language="tr" fo:country="TR" style:language-complex="ar" style:country-complex="AE"/>
    </style:style>
    <style:style style:name="P145" style:parent-style-name="Standard" style:family="paragraph">
      <style:paragraph-properties style:writing-mode="rl-tb"/>
    </style:style>
    <style:style style:name="T146" style:parent-style-name="DefaultParagraphFont" style:family="text">
      <style:text-properties fo:language="tr" fo:country="TR" style:language-complex="ar" style:country-complex="SA"/>
    </style:style>
    <style:style style:name="T147" style:parent-style-name="DefaultParagraphFont" style:family="text">
      <style:text-properties fo:language="tr" fo:country="TR" style:language-complex="ar" style:country-complex="AE"/>
    </style:style>
    <style:style style:name="P148" style:parent-style-name="Standard" style:family="paragraph">
      <style:paragraph-properties style:writing-mode="rl-tb"/>
    </style:style>
    <style:style style:name="T149" style:parent-style-name="DefaultParagraphFont" style:family="text">
      <style:text-properties fo:language="tr" fo:country="TR" style:language-complex="ar" style:country-complex="SA"/>
    </style:style>
    <style:style style:name="T150" style:parent-style-name="DefaultParagraphFont" style:family="text">
      <style:text-properties fo:language="tr" fo:country="TR" style:language-complex="ar" style:country-complex="AE"/>
    </style:style>
    <style:style style:name="P151" style:parent-style-name="Standard" style:family="paragraph">
      <style:paragraph-properties style:writing-mode="rl-tb"/>
    </style:style>
    <style:style style:name="T152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53" style:parent-style-name="DefaultParagraphFont" style:family="text">
      <style:text-properties fo:language="tr" fo:country="TR" style:language-complex="ar" style:country-complex="AE"/>
    </style:style>
    <style:style style:name="T154" style:parent-style-name="DefaultParagraphFont" style:family="text">
      <style:text-properties fo:language="tr" fo:country="TR" style:language-complex="ar" style:country-complex="SA"/>
    </style:style>
    <style:style style:name="T15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56" style:parent-style-name="DefaultParagraphFont" style:family="text">
      <style:text-properties fo:language="tr" fo:country="TR" style:language-complex="ar" style:country-complex="AE"/>
    </style:style>
    <style:style style:name="T157" style:parent-style-name="DefaultParagraphFont" style:family="text">
      <style:text-properties fo:language="tr" fo:country="TR" style:language-complex="ar" style:country-complex="SA"/>
    </style:style>
    <style:style style:name="T15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59" style:parent-style-name="DefaultParagraphFont" style:family="text">
      <style:text-properties fo:language="tr" fo:country="TR" style:language-complex="ar" style:country-complex="AE"/>
    </style:style>
    <style:style style:name="T160" style:parent-style-name="DefaultParagraphFont" style:family="text">
      <style:text-properties fo:language="tr" fo:country="TR" style:language-complex="ar" style:country-complex="SA"/>
    </style:style>
    <style:style style:name="T16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62" style:parent-style-name="DefaultParagraphFont" style:family="text">
      <style:text-properties fo:language="tr" fo:country="TR" style:language-complex="ar" style:country-complex="AE"/>
    </style:style>
    <style:style style:name="T163" style:parent-style-name="DefaultParagraphFont" style:family="text">
      <style:text-properties fo:language="tr" fo:country="TR" style:language-complex="ar" style:country-complex="SA"/>
    </style:style>
    <style:style style:name="T164" style:parent-style-name="DefaultParagraphFont" style:family="text">
      <style:text-properties fo:language="tr" fo:country="TR" style:language-complex="ar" style:country-complex="AE"/>
    </style:style>
    <style:style style:name="T165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66" style:parent-style-name="DefaultParagraphFont" style:family="text">
      <style:text-properties fo:language="tr" fo:country="TR" style:language-complex="ar" style:country-complex="AE"/>
    </style:style>
    <style:style style:name="T167" style:parent-style-name="DefaultParagraphFont" style:family="text">
      <style:text-properties fo:language="tr" fo:country="TR" style:language-complex="ar" style:country-complex="SA"/>
    </style:style>
    <style:style style:name="T168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69" style:parent-style-name="DefaultParagraphFont" style:family="text">
      <style:text-properties fo:language="tr" fo:country="TR" style:language-complex="ar" style:country-complex="AE"/>
    </style:style>
    <style:style style:name="T170" style:parent-style-name="DefaultParagraphFont" style:family="text">
      <style:text-properties fo:language="tr" fo:country="TR" style:language-complex="ar" style:country-complex="SA"/>
    </style:style>
    <style:style style:name="T171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72" style:parent-style-name="DefaultParagraphFont" style:family="text">
      <style:text-properties fo:language="tr" fo:country="TR" style:language-complex="ar" style:country-complex="AE"/>
    </style:style>
    <style:style style:name="T173" style:parent-style-name="DefaultParagraphFont" style:family="text">
      <style:text-properties fo:language="tr" fo:country="TR" style:language-complex="ar" style:country-complex="SA"/>
    </style:style>
    <style:style style:name="T174" style:parent-style-name="DefaultParagraphFont" style:family="text">
      <style:text-properties style:font-name="Segoe UI Symbol" style:font-name-complex="Segoe UI Symbol" fo:language="tr" fo:country="TR" style:language-complex="ar" style:country-complex="AE"/>
    </style:style>
    <style:style style:name="T175" style:parent-style-name="DefaultParagraphFont" style:family="text">
      <style:text-properties fo:language="tr" fo:country="TR" style:language-complex="ar" style:country-complex="AE"/>
    </style:style>
    <style:style style:name="T176" style:parent-style-name="DefaultParagraphFont" style:family="text">
      <style:text-properties fo:language="tr" fo:country="TR" style:language-complex="ar" style:country-complex="SA"/>
    </style:style>
    <style:style style:name="P177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17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79" style:parent-style-name="Standard" style:family="paragraph">
      <style:paragraph-properties style:writing-mode="rl-tb"/>
    </style:style>
    <style:style style:name="T180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18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183" style:parent-style-name="Standard" style:family="paragraph">
      <style:paragraph-properties style:writing-mode="rl-tb"/>
    </style:style>
    <style:style style:name="T18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8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8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87" style:parent-style-name="Standard" style:family="paragraph">
      <style:paragraph-properties style:writing-mode="rl-tb"/>
    </style:style>
    <style:style style:name="T188" style:parent-style-name="DefaultParagraphFont" style:family="text">
      <style:text-properties fo:language="tr" fo:country="TR" style:language-complex="ar" style:country-complex="SA"/>
    </style:style>
    <style:style style:name="T189" style:parent-style-name="DefaultParagraphFont" style:family="text">
      <style:text-properties fo:language="tr" fo:country="TR" style:language-complex="ar" style:country-complex="AE"/>
    </style:style>
    <style:style style:name="P19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191" style:parent-style-name="Standard" style:family="paragraph">
      <style:paragraph-properties style:writing-mode="rl-tb"/>
    </style:style>
    <style:style style:name="T19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19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19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195" style:parent-style-name="Standard" style:family="paragraph">
      <style:paragraph-properties style:writing-mode="rl-tb"/>
    </style:style>
    <style:style style:name="T196" style:parent-style-name="DefaultParagraphFont" style:family="text">
      <style:text-properties fo:language="tr" fo:country="TR" style:language-complex="ar" style:country-complex="SA"/>
    </style:style>
    <style:style style:name="T197" style:parent-style-name="DefaultParagraphFont" style:family="text">
      <style:text-properties fo:language="tr" fo:country="TR" style:language-complex="ar" style:country-complex="AE"/>
    </style:style>
    <style:style style:name="P198" style:parent-style-name="Standard" style:list-style-name="LFO4" style:family="paragraph">
      <style:paragraph-properties style:writing-mode="rl-tb"/>
    </style:style>
    <style:style style:name="T199" style:parent-style-name="DefaultParagraphFont" style:family="text">
      <style:text-properties fo:language="tr" fo:country="TR" style:language-complex="ar" style:country-complex="SA"/>
    </style:style>
    <style:style style:name="P200" style:parent-style-name="Standard" style:list-style-name="LFO4" style:family="paragraph">
      <style:paragraph-properties style:writing-mode="rl-tb"/>
    </style:style>
    <style:style style:name="T201" style:parent-style-name="DefaultParagraphFont" style:family="text">
      <style:text-properties fo:language="tr" fo:country="TR" style:language-complex="ar" style:country-complex="SA"/>
    </style:style>
    <style:style style:name="P202" style:parent-style-name="Standard" style:list-style-name="LFO4" style:family="paragraph">
      <style:paragraph-properties style:writing-mode="rl-tb"/>
    </style:style>
    <style:style style:name="T203" style:parent-style-name="DefaultParagraphFont" style:family="text">
      <style:text-properties fo:language="tr" fo:country="TR" style:language-complex="ar" style:country-complex="SA"/>
    </style:style>
    <style:style style:name="P204" style:parent-style-name="Standard" style:list-style-name="LFO4" style:family="paragraph">
      <style:paragraph-properties style:writing-mode="rl-tb"/>
    </style:style>
    <style:style style:name="T205" style:parent-style-name="DefaultParagraphFont" style:family="text">
      <style:text-properties fo:language="tr" fo:country="TR" style:language-complex="ar" style:country-complex="SA"/>
    </style:style>
    <style:style style:name="P206" style:parent-style-name="Standard" style:list-style-name="LFO4" style:family="paragraph">
      <style:paragraph-properties style:writing-mode="rl-tb"/>
    </style:style>
    <style:style style:name="T207" style:parent-style-name="DefaultParagraphFont" style:family="text">
      <style:text-properties fo:language="tr" fo:country="TR" style:language-complex="ar" style:country-complex="SA"/>
    </style:style>
    <style:style style:name="P208" style:parent-style-name="Standard" style:family="paragraph">
      <style:paragraph-properties style:writing-mode="rl-tb"/>
    </style:style>
    <style:style style:name="T20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1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12" style:parent-style-name="Standard" style:family="paragraph">
      <style:paragraph-properties style:writing-mode="rl-tb"/>
    </style:style>
    <style:style style:name="T213" style:parent-style-name="DefaultParagraphFont" style:family="text">
      <style:text-properties fo:language="tr" fo:country="TR" style:language-complex="ar" style:country-complex="SA"/>
    </style:style>
    <style:style style:name="T214" style:parent-style-name="DefaultParagraphFont" style:family="text">
      <style:text-properties fo:language="tr" fo:country="TR" style:language-complex="ar" style:country-complex="AE"/>
    </style:style>
    <style:style style:name="P215" style:parent-style-name="Standard" style:family="paragraph">
      <style:paragraph-properties style:writing-mode="rl-tb"/>
    </style:style>
    <style:style style:name="T21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1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19" style:parent-style-name="Standard" style:family="paragraph">
      <style:paragraph-properties style:writing-mode="rl-tb"/>
    </style:style>
    <style:style style:name="T220" style:parent-style-name="DefaultParagraphFont" style:family="text">
      <style:text-properties fo:language="tr" fo:country="TR" style:language-complex="ar" style:country-complex="SA"/>
    </style:style>
    <style:style style:name="T221" style:parent-style-name="DefaultParagraphFont" style:family="text">
      <style:text-properties fo:language="tr" fo:country="TR" style:language-complex="ar" style:country-complex="AE"/>
    </style:style>
    <style:style style:name="P222" style:parent-style-name="Standard" style:list-style-name="LFO5" style:family="paragraph">
      <style:paragraph-properties style:writing-mode="rl-tb"/>
    </style:style>
    <style:style style:name="T223" style:parent-style-name="DefaultParagraphFont" style:family="text">
      <style:text-properties fo:language="tr" fo:country="TR" style:language-complex="ar" style:country-complex="SA"/>
    </style:style>
    <style:style style:name="P224" style:parent-style-name="Standard" style:list-style-name="LFO5" style:family="paragraph">
      <style:paragraph-properties style:writing-mode="rl-tb"/>
    </style:style>
    <style:style style:name="T225" style:parent-style-name="DefaultParagraphFont" style:family="text">
      <style:text-properties fo:language="tr" fo:country="TR" style:language-complex="ar" style:country-complex="SA"/>
    </style:style>
    <style:style style:name="P226" style:parent-style-name="Standard" style:list-style-name="LFO5" style:family="paragraph">
      <style:paragraph-properties style:writing-mode="rl-tb"/>
    </style:style>
    <style:style style:name="T227" style:parent-style-name="DefaultParagraphFont" style:family="text">
      <style:text-properties fo:language="tr" fo:country="TR" style:language-complex="ar" style:country-complex="SA"/>
    </style:style>
    <style:style style:name="P228" style:parent-style-name="Standard" style:list-style-name="LFO5" style:family="paragraph">
      <style:paragraph-properties style:writing-mode="rl-tb"/>
    </style:style>
    <style:style style:name="T229" style:parent-style-name="DefaultParagraphFont" style:family="text">
      <style:text-properties fo:language="tr" fo:country="TR" style:language-complex="ar" style:country-complex="SA"/>
    </style:style>
    <style:style style:name="P230" style:parent-style-name="Standard" style:family="paragraph">
      <style:paragraph-properties style:writing-mode="rl-tb"/>
    </style:style>
    <style:style style:name="T23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3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3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34" style:parent-style-name="Standard" style:family="paragraph">
      <style:paragraph-properties style:writing-mode="rl-tb"/>
    </style:style>
    <style:style style:name="T235" style:parent-style-name="DefaultParagraphFont" style:family="text">
      <style:text-properties fo:language="tr" fo:country="TR" style:language-complex="ar" style:country-complex="SA"/>
    </style:style>
    <style:style style:name="T236" style:parent-style-name="DefaultParagraphFont" style:family="text">
      <style:text-properties fo:language="tr" fo:country="TR" style:language-complex="ar" style:country-complex="AE"/>
    </style:style>
    <style:style style:name="P237" style:parent-style-name="Standard" style:list-style-name="LFO6" style:family="paragraph">
      <style:paragraph-properties style:writing-mode="rl-tb"/>
      <style:text-properties fo:language="tr" fo:country="TR" style:language-complex="ar" style:country-complex="AE"/>
    </style:style>
    <style:style style:name="P238" style:parent-style-name="Standard" style:list-style-name="LFO6" style:family="paragraph">
      <style:paragraph-properties style:writing-mode="rl-tb"/>
      <style:text-properties fo:language="tr" fo:country="TR" style:language-complex="ar" style:country-complex="AE"/>
    </style:style>
    <style:style style:name="P239" style:parent-style-name="Standard" style:list-style-name="LFO6" style:family="paragraph">
      <style:paragraph-properties style:writing-mode="rl-tb"/>
      <style:text-properties fo:language="tr" fo:country="TR" style:language-complex="ar" style:country-complex="AE"/>
    </style:style>
    <style:style style:name="P24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41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242" style:parent-style-name="Standard" style:family="paragraph">
      <style:paragraph-properties style:writing-mode="rl-tb"/>
    </style:style>
    <style:style style:name="T243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24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4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246" style:parent-style-name="Standard" style:family="paragraph">
      <style:paragraph-properties style:writing-mode="rl-tb"/>
    </style:style>
    <style:style style:name="T24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4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4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5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51" style:parent-style-name="Standard" style:family="paragraph">
      <style:paragraph-properties style:writing-mode="rl-tb"/>
    </style:style>
    <style:style style:name="T252" style:parent-style-name="DefaultParagraphFont" style:family="text">
      <style:text-properties fo:language="tr" fo:country="TR" style:language-complex="ar" style:country-complex="SA"/>
    </style:style>
    <style:style style:name="T253" style:parent-style-name="DefaultParagraphFont" style:family="text">
      <style:text-properties fo:language="tr" fo:country="TR" style:language-complex="ar" style:country-complex="AE"/>
    </style:style>
    <style:style style:name="P254" style:parent-style-name="Standard" style:list-style-name="LFO7" style:family="paragraph">
      <style:paragraph-properties style:writing-mode="rl-tb"/>
    </style:style>
    <style:style style:name="T255" style:parent-style-name="DefaultParagraphFont" style:family="text">
      <style:text-properties fo:language="tr" fo:country="TR" style:language-complex="ar" style:country-complex="AE"/>
    </style:style>
    <style:style style:name="T256" style:parent-style-name="DefaultParagraphFont" style:family="text">
      <style:text-properties fo:language="tr" fo:country="TR" style:language-complex="ar" style:country-complex="SA"/>
    </style:style>
    <style:style style:name="T257" style:parent-style-name="DefaultParagraphFont" style:family="text">
      <style:text-properties fo:language="tr" fo:country="TR" style:language-complex="ar" style:country-complex="AE"/>
    </style:style>
    <style:style style:name="P258" style:parent-style-name="Standard" style:list-style-name="LFO7" style:family="paragraph">
      <style:paragraph-properties style:writing-mode="rl-tb"/>
    </style:style>
    <style:style style:name="T259" style:parent-style-name="DefaultParagraphFont" style:family="text">
      <style:text-properties fo:language="tr" fo:country="TR" style:language-complex="ar" style:country-complex="AE"/>
    </style:style>
    <style:style style:name="T260" style:parent-style-name="DefaultParagraphFont" style:family="text">
      <style:text-properties fo:language="tr" fo:country="TR" style:language-complex="ar" style:country-complex="SA"/>
    </style:style>
    <style:style style:name="T261" style:parent-style-name="DefaultParagraphFont" style:family="text">
      <style:text-properties fo:language="tr" fo:country="TR" style:language-complex="ar" style:country-complex="AE"/>
    </style:style>
    <style:style style:name="P262" style:parent-style-name="Standard" style:list-style-name="LFO7" style:family="paragraph">
      <style:paragraph-properties style:writing-mode="rl-tb"/>
    </style:style>
    <style:style style:name="T263" style:parent-style-name="DefaultParagraphFont" style:family="text">
      <style:text-properties fo:language="tr" fo:country="TR" style:language-complex="ar" style:country-complex="AE"/>
    </style:style>
    <style:style style:name="T264" style:parent-style-name="DefaultParagraphFont" style:family="text">
      <style:text-properties fo:language="tr" fo:country="TR" style:language-complex="ar" style:country-complex="SA"/>
    </style:style>
    <style:style style:name="T265" style:parent-style-name="DefaultParagraphFont" style:family="text">
      <style:text-properties fo:language="tr" fo:country="TR" style:language-complex="ar" style:country-complex="AE"/>
    </style:style>
    <style:style style:name="P266" style:parent-style-name="Standard" style:list-style-name="LFO7" style:family="paragraph">
      <style:paragraph-properties style:writing-mode="rl-tb"/>
    </style:style>
    <style:style style:name="T267" style:parent-style-name="DefaultParagraphFont" style:family="text">
      <style:text-properties fo:language="tr" fo:country="TR" style:language-complex="ar" style:country-complex="AE"/>
    </style:style>
    <style:style style:name="T268" style:parent-style-name="DefaultParagraphFont" style:family="text">
      <style:text-properties fo:language="tr" fo:country="TR" style:language-complex="ar" style:country-complex="SA"/>
    </style:style>
    <style:style style:name="T269" style:parent-style-name="DefaultParagraphFont" style:family="text">
      <style:text-properties fo:language="tr" fo:country="TR" style:language-complex="ar" style:country-complex="AE"/>
    </style:style>
    <style:style style:name="P270" style:parent-style-name="Standard" style:family="paragraph">
      <style:paragraph-properties style:writing-mode="rl-tb"/>
    </style:style>
    <style:style style:name="T27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7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27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27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75" style:parent-style-name="Standard" style:family="paragraph">
      <style:paragraph-properties style:writing-mode="rl-tb"/>
    </style:style>
    <style:style style:name="T276" style:parent-style-name="DefaultParagraphFont" style:family="text">
      <style:text-properties fo:language="tr" fo:country="TR" style:language-complex="ar" style:country-complex="SA"/>
    </style:style>
    <style:style style:name="T277" style:parent-style-name="DefaultParagraphFont" style:family="text">
      <style:text-properties fo:language="tr" fo:country="TR" style:language-complex="ar" style:country-complex="AE"/>
    </style:style>
    <style:style style:name="P278" style:parent-style-name="Standard" style:list-style-name="LFO8" style:family="paragraph">
      <style:paragraph-properties style:writing-mode="rl-tb"/>
    </style:style>
    <style:style style:name="T279" style:parent-style-name="DefaultParagraphFont" style:family="text">
      <style:text-properties fo:language="tr" fo:country="TR" style:language-complex="ar" style:country-complex="AE"/>
    </style:style>
    <style:style style:name="T280" style:parent-style-name="DefaultParagraphFont" style:family="text">
      <style:text-properties fo:language="tr" fo:country="TR" style:language-complex="ar" style:country-complex="SA"/>
    </style:style>
    <style:style style:name="T281" style:parent-style-name="DefaultParagraphFont" style:family="text">
      <style:text-properties fo:language="tr" fo:country="TR" style:language-complex="ar" style:country-complex="AE"/>
    </style:style>
    <style:style style:name="P282" style:parent-style-name="Standard" style:list-style-name="LFO8" style:family="paragraph">
      <style:paragraph-properties style:writing-mode="rl-tb"/>
    </style:style>
    <style:style style:name="T283" style:parent-style-name="DefaultParagraphFont" style:family="text">
      <style:text-properties fo:language="tr" fo:country="TR" style:language-complex="ar" style:country-complex="AE"/>
    </style:style>
    <style:style style:name="T284" style:parent-style-name="DefaultParagraphFont" style:family="text">
      <style:text-properties fo:language="tr" fo:country="TR" style:language-complex="ar" style:country-complex="SA"/>
    </style:style>
    <style:style style:name="T285" style:parent-style-name="DefaultParagraphFont" style:family="text">
      <style:text-properties fo:language="tr" fo:country="TR" style:language-complex="ar" style:country-complex="AE"/>
    </style:style>
    <style:style style:name="P286" style:parent-style-name="Standard" style:list-style-name="LFO8" style:family="paragraph">
      <style:paragraph-properties style:writing-mode="rl-tb"/>
    </style:style>
    <style:style style:name="T287" style:parent-style-name="DefaultParagraphFont" style:family="text">
      <style:text-properties fo:language="tr" fo:country="TR" style:language-complex="ar" style:country-complex="AE"/>
    </style:style>
    <style:style style:name="T288" style:parent-style-name="DefaultParagraphFont" style:family="text">
      <style:text-properties fo:language="tr" fo:country="TR" style:language-complex="ar" style:country-complex="SA"/>
    </style:style>
    <style:style style:name="T289" style:parent-style-name="DefaultParagraphFont" style:family="text">
      <style:text-properties fo:language="tr" fo:country="TR" style:language-complex="ar" style:country-complex="AE"/>
    </style:style>
    <style:style style:name="P290" style:parent-style-name="Standard" style:list-style-name="LFO8" style:family="paragraph">
      <style:paragraph-properties style:writing-mode="rl-tb"/>
    </style:style>
    <style:style style:name="T291" style:parent-style-name="DefaultParagraphFont" style:family="text">
      <style:text-properties fo:language="tr" fo:country="TR" style:language-complex="ar" style:country-complex="AE"/>
    </style:style>
    <style:style style:name="T292" style:parent-style-name="DefaultParagraphFont" style:family="text">
      <style:text-properties fo:language="tr" fo:country="TR" style:language-complex="ar" style:country-complex="SA"/>
    </style:style>
    <style:style style:name="T293" style:parent-style-name="DefaultParagraphFont" style:family="text">
      <style:text-properties fo:language="tr" fo:country="TR" style:language-complex="ar" style:country-complex="AE"/>
    </style:style>
    <style:style style:name="P294" style:parent-style-name="Standard" style:family="paragraph">
      <style:paragraph-properties style:writing-mode="rl-tb"/>
    </style:style>
    <style:style style:name="T29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29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297" style:parent-style-name="Standard" style:family="paragraph">
      <style:paragraph-properties style:writing-mode="rl-tb"/>
    </style:style>
    <style:style style:name="T298" style:parent-style-name="DefaultParagraphFont" style:family="text">
      <style:text-properties fo:language="tr" fo:country="TR" style:language-complex="ar" style:country-complex="SA"/>
    </style:style>
    <style:style style:name="T299" style:parent-style-name="DefaultParagraphFont" style:family="text">
      <style:text-properties fo:language="tr" fo:country="TR" style:language-complex="ar" style:country-complex="AE"/>
    </style:style>
    <style:style style:name="P300" style:parent-style-name="Standard" style:family="paragraph">
      <style:paragraph-properties style:writing-mode="rl-tb"/>
    </style:style>
    <style:style style:name="T30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0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0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05" style:parent-style-name="Standard" style:family="paragraph">
      <style:paragraph-properties style:writing-mode="rl-tb"/>
    </style:style>
    <style:style style:name="T306" style:parent-style-name="DefaultParagraphFont" style:family="text">
      <style:text-properties fo:language="tr" fo:country="TR" style:language-complex="ar" style:country-complex="SA"/>
    </style:style>
    <style:style style:name="T307" style:parent-style-name="DefaultParagraphFont" style:family="text">
      <style:text-properties fo:language="tr" fo:country="TR" style:language-complex="ar" style:country-complex="AE"/>
    </style:style>
    <style:style style:name="P30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0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1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11" style:parent-style-name="Standard" style:family="paragraph">
      <style:paragraph-properties style:writing-mode="rl-tb"/>
    </style:style>
    <style:style style:name="T31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1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15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6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17" style:parent-style-name="Standard" style:family="paragraph">
      <style:paragraph-properties style:writing-mode="rl-tb"/>
    </style:style>
    <style:style style:name="T3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1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2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321" style:parent-style-name="Standard" style:family="paragraph">
      <style:paragraph-properties style:writing-mode="rl-tb"/>
    </style:style>
    <style:style style:name="T322" style:parent-style-name="DefaultParagraphFont" style:family="text">
      <style:text-properties fo:language="tr" fo:country="TR" style:language-complex="ar" style:country-complex="SA"/>
    </style:style>
    <style:style style:name="T323" style:parent-style-name="DefaultParagraphFont" style:family="text">
      <style:text-properties fo:language="tr" fo:country="TR" style:language-complex="ar" style:country-complex="AE"/>
    </style:style>
    <style:style style:name="T324" style:parent-style-name="DefaultParagraphFont" style:family="text">
      <style:text-properties fo:language="tr" fo:country="TR" style:language-complex="ar" style:country-complex="SA"/>
    </style:style>
    <style:style style:name="T325" style:parent-style-name="DefaultParagraphFont" style:family="text">
      <style:text-properties fo:language="tr" fo:country="TR" style:language-complex="ar" style:country-complex="AE"/>
    </style:style>
    <style:style style:name="P326" style:parent-style-name="Standard" style:family="paragraph">
      <style:paragraph-properties style:writing-mode="rl-tb"/>
    </style:style>
    <style:style style:name="T32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2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29" style:parent-style-name="Standard" style:family="paragraph">
      <style:paragraph-properties style:writing-mode="rl-tb"/>
    </style:style>
    <style:style style:name="T330" style:parent-style-name="DefaultParagraphFont" style:family="text">
      <style:text-properties fo:language="tr" fo:country="TR" style:language-complex="ar" style:country-complex="SA"/>
    </style:style>
    <style:style style:name="P331" style:parent-style-name="Standard" style:family="paragraph">
      <style:paragraph-properties style:writing-mode="rl-tb"/>
    </style:style>
    <style:style style:name="T33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3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34" style:parent-style-name="Standard" style:family="paragraph">
      <style:paragraph-properties style:writing-mode="rl-tb"/>
    </style:style>
    <style:style style:name="T335" style:parent-style-name="DefaultParagraphFont" style:family="text">
      <style:text-properties fo:language="tr" fo:country="TR" style:language-complex="ar" style:country-complex="SA"/>
    </style:style>
    <style:style style:name="T336" style:parent-style-name="DefaultParagraphFont" style:family="text">
      <style:text-properties fo:language="tr" fo:country="TR" style:language-complex="ar" style:country-complex="AE"/>
    </style:style>
    <style:style style:name="P337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338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339" style:parent-style-name="Standard" style:list-style-name="LFO9" style:family="paragraph">
      <style:paragraph-properties style:writing-mode="rl-tb"/>
      <style:text-properties fo:language="tr" fo:country="TR" style:language-complex="ar" style:country-complex="AE"/>
    </style:style>
    <style:style style:name="P340" style:parent-style-name="Standard" style:family="paragraph">
      <style:paragraph-properties style:writing-mode="rl-tb"/>
    </style:style>
    <style:style style:name="T34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4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43" style:parent-style-name="Standard" style:family="paragraph">
      <style:paragraph-properties style:writing-mode="rl-tb"/>
    </style:style>
    <style:style style:name="T344" style:parent-style-name="DefaultParagraphFont" style:family="text">
      <style:text-properties fo:language="tr" fo:country="TR" style:language-complex="ar" style:country-complex="SA"/>
    </style:style>
    <style:style style:name="T345" style:parent-style-name="DefaultParagraphFont" style:family="text">
      <style:text-properties fo:language="tr" fo:country="TR" style:language-complex="ar" style:country-complex="AE"/>
    </style:style>
    <style:style style:name="P346" style:parent-style-name="Standard" style:list-style-name="LFO10" style:family="paragraph">
      <style:paragraph-properties style:writing-mode="rl-tb"/>
      <style:text-properties fo:language="tr" fo:country="TR" style:language-complex="ar" style:country-complex="AE"/>
    </style:style>
    <style:style style:name="P347" style:parent-style-name="Standard" style:list-style-name="LFO10" style:family="paragraph">
      <style:paragraph-properties style:writing-mode="rl-tb"/>
      <style:text-properties fo:language="tr" fo:country="TR" style:language-complex="ar" style:country-complex="AE"/>
    </style:style>
    <style:style style:name="P348" style:parent-style-name="Standard" style:list-style-name="LFO10" style:family="paragraph">
      <style:paragraph-properties style:writing-mode="rl-tb"/>
      <style:text-properties fo:language="tr" fo:country="TR" style:language-complex="ar" style:country-complex="AE"/>
    </style:style>
    <style:style style:name="P349" style:parent-style-name="Standard" style:family="paragraph">
      <style:paragraph-properties style:writing-mode="rl-tb"/>
    </style:style>
    <style:style style:name="T35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5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52" style:parent-style-name="Standard" style:family="paragraph">
      <style:paragraph-properties style:writing-mode="rl-tb"/>
    </style:style>
    <style:style style:name="T353" style:parent-style-name="DefaultParagraphFont" style:family="text">
      <style:text-properties fo:language="tr" fo:country="TR" style:language-complex="ar" style:country-complex="SA"/>
    </style:style>
    <style:style style:name="T354" style:parent-style-name="DefaultParagraphFont" style:family="text">
      <style:text-properties fo:language="tr" fo:country="TR" style:language-complex="ar" style:country-complex="AE"/>
    </style:style>
    <style:style style:name="P355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56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57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58" style:parent-style-name="Standard" style:family="paragraph">
      <style:paragraph-properties style:writing-mode="rl-tb"/>
    </style:style>
    <style:style style:name="T359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6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6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62" style:parent-style-name="Standard" style:family="paragraph">
      <style:paragraph-properties style:writing-mode="rl-tb"/>
    </style:style>
    <style:style style:name="T363" style:parent-style-name="DefaultParagraphFont" style:family="text">
      <style:text-properties fo:language="tr" fo:country="TR" style:language-complex="ar" style:country-complex="SA"/>
    </style:style>
    <style:style style:name="T36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365" style:parent-style-name="DefaultParagraphFont" style:family="text">
      <style:text-properties fo:language="tr" fo:country="TR" style:language-complex="ar" style:country-complex="AE"/>
    </style:style>
    <style:style style:name="P366" style:parent-style-name="Standard" style:family="paragraph">
      <style:paragraph-properties style:writing-mode="rl-tb"/>
    </style:style>
    <style:style style:name="T367" style:parent-style-name="DefaultParagraphFont" style:family="text">
      <style:text-properties fo:language="tr" fo:country="TR" style:language-complex="ar" style:country-complex="SA"/>
    </style:style>
    <style:style style:name="T368" style:parent-style-name="DefaultParagraphFont" style:family="text">
      <style:text-properties fo:language="tr" fo:country="TR" style:language-complex="ar" style:country-complex="AE"/>
    </style:style>
    <style:style style:name="P369" style:parent-style-name="Standard" style:list-style-name="LFO11" style:family="paragraph">
      <style:paragraph-properties style:writing-mode="rl-tb"/>
    </style:style>
    <style:style style:name="T370" style:parent-style-name="DefaultParagraphFont" style:family="text">
      <style:text-properties fo:language="tr" fo:country="TR" style:language-complex="ar" style:country-complex="SA"/>
    </style:style>
    <style:style style:name="T371" style:parent-style-name="DefaultParagraphFont" style:family="text">
      <style:text-properties fo:language="tr" fo:country="TR" style:language-complex="ar" style:country-complex="AE"/>
    </style:style>
    <style:style style:name="P372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373" style:parent-style-name="Standard" style:list-style-name="LFO11" style:family="paragraph">
      <style:paragraph-properties style:writing-mode="rl-tb"/>
      <style:text-properties fo:language="tr" fo:country="TR" style:language-complex="ar" style:country-complex="AE"/>
    </style:style>
    <style:style style:name="P374" style:parent-style-name="Standard" style:list-style-name="LFO11" style:family="paragraph">
      <style:paragraph-properties style:writing-mode="rl-tb"/>
    </style:style>
    <style:style style:name="T375" style:parent-style-name="DefaultParagraphFont" style:family="text">
      <style:text-properties fo:language="tr" fo:country="TR" style:language-complex="ar" style:country-complex="SA"/>
    </style:style>
    <style:style style:name="T376" style:parent-style-name="DefaultParagraphFont" style:family="text">
      <style:text-properties fo:language="tr" fo:country="TR" style:language-complex="ar" style:country-complex="AE"/>
    </style:style>
    <style:style style:name="P377" style:parent-style-name="Standard" style:list-style-name="LFO11" style:family="paragraph">
      <style:paragraph-properties style:writing-mode="rl-tb"/>
    </style:style>
    <style:style style:name="T378" style:parent-style-name="DefaultParagraphFont" style:family="text">
      <style:text-properties fo:language="tr" fo:country="TR" style:language-complex="ar" style:country-complex="SA"/>
    </style:style>
    <style:style style:name="T379" style:parent-style-name="DefaultParagraphFont" style:family="text">
      <style:text-properties fo:language="tr" fo:country="TR" style:language-complex="ar" style:country-complex="AE"/>
    </style:style>
    <style:style style:name="P380" style:parent-style-name="Standard" style:list-style-name="LFO11" style:family="paragraph">
      <style:paragraph-properties style:writing-mode="rl-tb"/>
    </style:style>
    <style:style style:name="T381" style:parent-style-name="DefaultParagraphFont" style:family="text">
      <style:text-properties fo:language="tr" fo:country="TR" style:language-complex="ar" style:country-complex="SA"/>
    </style:style>
    <style:style style:name="T382" style:parent-style-name="DefaultParagraphFont" style:family="text">
      <style:text-properties fo:language="tr" fo:country="TR" style:language-complex="ar" style:country-complex="AE"/>
    </style:style>
    <style:style style:name="P383" style:parent-style-name="Standard" style:family="paragraph">
      <style:paragraph-properties style:writing-mode="rl-tb"/>
    </style:style>
    <style:style style:name="T384" style:parent-style-name="DefaultParagraphFont" style:family="text">
      <style:text-properties fo:language="tr" fo:country="TR" style:language-complex="ar" style:country-complex="SA"/>
    </style:style>
    <style:style style:name="T385" style:parent-style-name="DefaultParagraphFont" style:family="text">
      <style:text-properties fo:language="tr" fo:country="TR" style:language-complex="ar" style:country-complex="AE"/>
    </style:style>
    <style:style style:name="P386" style:parent-style-name="Standard" style:family="paragraph">
      <style:paragraph-properties fo:text-align="center" style:writing-mode="rl-tb"/>
    </style:style>
    <style:style style:name="P387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388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389" style:parent-style-name="Standard" style:family="paragraph">
      <style:paragraph-properties style:writing-mode="rl-tb"/>
      <style:text-properties fo:language="tr" fo:country="TR" style:language-complex="ar" style:country-complex="SA"/>
    </style:style>
    <style:style style:name="P390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391" style:parent-style-name="Standard" style:family="paragraph">
      <style:paragraph-properties style:writing-mode="rl-tb"/>
    </style:style>
    <style:style style:name="T392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393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4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95" style:parent-style-name="Standard" style:family="paragraph">
      <style:paragraph-properties style:writing-mode="rl-tb"/>
    </style:style>
    <style:style style:name="T396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397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398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399" style:parent-style-name="Standard" style:family="paragraph">
      <style:paragraph-properties style:writing-mode="rl-tb"/>
    </style:style>
    <style:style style:name="T400" style:parent-style-name="DefaultParagraphFont" style:family="text">
      <style:text-properties fo:language="tr" fo:country="TR" style:language-complex="ar" style:country-complex="SA"/>
    </style:style>
    <style:style style:name="T401" style:parent-style-name="DefaultParagraphFont" style:family="text">
      <style:text-properties fo:language="tr" fo:country="TR" style:language-complex="ar" style:country-complex="AE"/>
    </style:style>
    <style:style style:name="P402" style:parent-style-name="Standard" style:family="paragraph">
      <style:paragraph-properties style:writing-mode="rl-tb"/>
    </style:style>
    <style:style style:name="T40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0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06" style:parent-style-name="Standard" style:family="paragraph">
      <style:paragraph-properties style:writing-mode="rl-tb"/>
    </style:style>
    <style:style style:name="T407" style:parent-style-name="DefaultParagraphFont" style:family="text">
      <style:text-properties fo:language="tr" fo:country="TR" style:language-complex="ar" style:country-complex="SA"/>
    </style:style>
    <style:style style:name="T408" style:parent-style-name="DefaultParagraphFont" style:family="text">
      <style:text-properties fo:language="tr" fo:country="TR" style:language-complex="ar" style:country-complex="AE"/>
    </style:style>
    <style:style style:name="P409" style:parent-style-name="Standard" style:family="paragraph">
      <style:paragraph-properties style:writing-mode="rl-tb"/>
    </style:style>
    <style:style style:name="T410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1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12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13" style:parent-style-name="Standard" style:family="paragraph">
      <style:paragraph-properties style:writing-mode="rl-tb"/>
    </style:style>
    <style:style style:name="T414" style:parent-style-name="DefaultParagraphFont" style:family="text">
      <style:text-properties fo:language="tr" fo:country="TR" style:language-complex="ar" style:country-complex="SA"/>
    </style:style>
    <style:style style:name="T415" style:parent-style-name="DefaultParagraphFont" style:family="text">
      <style:text-properties fo:language="tr" fo:country="TR" style:language-complex="ar" style:country-complex="AE"/>
    </style:style>
    <style:style style:name="P416" style:parent-style-name="Standard" style:family="paragraph">
      <style:paragraph-properties style:writing-mode="rl-tb"/>
    </style:style>
    <style:style style:name="T41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1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1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20" style:parent-style-name="Standard" style:family="paragraph">
      <style:paragraph-properties style:writing-mode="rl-tb"/>
    </style:style>
    <style:style style:name="T421" style:parent-style-name="DefaultParagraphFont" style:family="text">
      <style:text-properties fo:language="tr" fo:country="TR" style:language-complex="ar" style:country-complex="SA"/>
    </style:style>
    <style:style style:name="T422" style:parent-style-name="DefaultParagraphFont" style:family="text">
      <style:text-properties fo:language="tr" fo:country="TR" style:language-complex="ar" style:country-complex="AE"/>
    </style:style>
    <style:style style:name="P423" style:parent-style-name="Standard" style:family="paragraph">
      <style:paragraph-properties style:writing-mode="rl-tb"/>
    </style:style>
    <style:style style:name="T424" style:parent-style-name="DefaultParagraphFont" style:family="text">
      <style:text-properties fo:language="tr" fo:country="TR" style:language-complex="ar" style:country-complex="SA"/>
    </style:style>
    <style:style style:name="T42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426" style:parent-style-name="DefaultParagraphFont" style:family="text">
      <style:text-properties fo:language="tr" fo:country="TR" style:language-complex="ar" style:country-complex="AE"/>
    </style:style>
    <style:style style:name="P427" style:parent-style-name="Standard" style:family="paragraph">
      <style:paragraph-properties style:writing-mode="rl-tb"/>
    </style:style>
    <style:style style:name="T428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2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3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31" style:parent-style-name="Standard" style:family="paragraph">
      <style:paragraph-properties style:writing-mode="rl-tb"/>
    </style:style>
    <style:style style:name="T432" style:parent-style-name="DefaultParagraphFont" style:family="text">
      <style:text-properties fo:language="tr" fo:country="TR" style:language-complex="ar" style:country-complex="SA"/>
    </style:style>
    <style:style style:name="T433" style:parent-style-name="DefaultParagraphFont" style:family="text">
      <style:text-properties fo:language="tr" fo:country="TR" style:language-complex="ar" style:country-complex="AE"/>
    </style:style>
    <style:style style:name="T434" style:parent-style-name="DefaultParagraphFont" style:family="text">
      <style:text-properties fo:language="tr" fo:country="TR" style:language-complex="ar" style:country-complex="SA"/>
    </style:style>
    <style:style style:name="T435" style:parent-style-name="DefaultParagraphFont" style:family="text">
      <style:text-properties fo:language="tr" fo:country="TR" style:language-complex="ar" style:country-complex="AE"/>
    </style:style>
    <style:style style:name="P436" style:parent-style-name="Standard" style:family="paragraph">
      <style:paragraph-properties style:writing-mode="rl-tb"/>
    </style:style>
    <style:style style:name="T43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3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3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40" style:parent-style-name="Standard" style:family="paragraph">
      <style:paragraph-properties style:writing-mode="rl-tb"/>
    </style:style>
    <style:style style:name="T44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4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44" style:parent-style-name="Standard" style:family="paragraph">
      <style:paragraph-properties style:writing-mode="rl-tb"/>
    </style:style>
    <style:style style:name="T44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4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4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48" style:parent-style-name="Standard" style:family="paragraph">
      <style:paragraph-properties style:writing-mode="rl-tb"/>
    </style:style>
    <style:style style:name="T44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5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5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52" style:parent-style-name="Standard" style:family="paragraph">
      <style:paragraph-properties style:writing-mode="rl-tb"/>
    </style:style>
    <style:style style:name="T45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5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5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45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57" style:parent-style-name="Standard" style:family="paragraph">
      <style:paragraph-properties style:writing-mode="rl-tb"/>
    </style:style>
    <style:style style:name="T458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59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60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461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62" style:parent-style-name="Standard" style:family="paragraph">
      <style:paragraph-properties style:writing-mode="rl-tb"/>
    </style:style>
    <style:style style:name="T46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6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6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T46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P467" style:parent-style-name="Standard" style:family="paragraph">
      <style:paragraph-properties style:writing-mode="rl-tb"/>
    </style:style>
    <style:style style:name="T468" style:parent-style-name="DefaultParagraphFont" style:family="text">
      <style:text-properties fo:language="tr" fo:country="TR" style:language-complex="ar" style:country-complex="SA"/>
    </style:style>
    <style:style style:name="T469" style:parent-style-name="DefaultParagraphFont" style:family="text">
      <style:text-properties fo:language="tr" fo:country="TR" style:language-complex="ar" style:country-complex="AE"/>
    </style:style>
    <style:style style:name="P470" style:parent-style-name="Standard" style:list-style-name="LFO12" style:family="paragraph">
      <style:paragraph-properties style:writing-mode="rl-tb"/>
    </style:style>
    <style:style style:name="T471" style:parent-style-name="DefaultParagraphFont" style:family="text">
      <style:text-properties fo:language="tr" fo:country="TR" style:language-complex="ar" style:country-complex="SA"/>
    </style:style>
    <style:style style:name="P472" style:parent-style-name="Standard" style:list-style-name="LFO12" style:family="paragraph">
      <style:paragraph-properties style:writing-mode="rl-tb"/>
    </style:style>
    <style:style style:name="T473" style:parent-style-name="DefaultParagraphFont" style:family="text">
      <style:text-properties fo:language="tr" fo:country="TR" style:language-complex="ar" style:country-complex="SA"/>
    </style:style>
    <style:style style:name="P474" style:parent-style-name="Standard" style:list-style-name="LFO12" style:family="paragraph">
      <style:paragraph-properties style:writing-mode="rl-tb"/>
    </style:style>
    <style:style style:name="T475" style:parent-style-name="DefaultParagraphFont" style:family="text">
      <style:text-properties fo:language="tr" fo:country="TR" style:language-complex="ar" style:country-complex="SA"/>
    </style:style>
    <style:style style:name="P476" style:parent-style-name="Standard" style:list-style-name="LFO12" style:family="paragraph">
      <style:paragraph-properties style:writing-mode="rl-tb"/>
    </style:style>
    <style:style style:name="T477" style:parent-style-name="DefaultParagraphFont" style:family="text">
      <style:text-properties fo:language="tr" fo:country="TR" style:language-complex="ar" style:country-complex="SA"/>
    </style:style>
    <style:style style:name="P478" style:parent-style-name="Standard" style:list-style-name="LFO12" style:family="paragraph">
      <style:paragraph-properties style:writing-mode="rl-tb"/>
    </style:style>
    <style:style style:name="T479" style:parent-style-name="DefaultParagraphFont" style:family="text">
      <style:text-properties fo:language="tr" fo:country="TR" style:language-complex="ar" style:country-complex="SA"/>
    </style:style>
    <style:style style:name="P480" style:parent-style-name="Standard" style:list-style-name="LFO12" style:family="paragraph">
      <style:paragraph-properties style:writing-mode="rl-tb"/>
    </style:style>
    <style:style style:name="T481" style:parent-style-name="DefaultParagraphFont" style:family="text">
      <style:text-properties fo:language="tr" fo:country="TR" style:language-complex="ar" style:country-complex="SA"/>
    </style:style>
    <style:style style:name="P482" style:parent-style-name="Standard" style:list-style-name="LFO12" style:family="paragraph">
      <style:paragraph-properties style:writing-mode="rl-tb"/>
    </style:style>
    <style:style style:name="T483" style:parent-style-name="DefaultParagraphFont" style:family="text">
      <style:text-properties fo:language="tr" fo:country="TR" style:language-complex="ar" style:country-complex="SA"/>
    </style:style>
    <style:style style:name="P484" style:parent-style-name="Standard" style:family="paragraph">
      <style:paragraph-properties style:writing-mode="rl-tb"/>
    </style:style>
    <style:style style:name="T485" style:parent-style-name="DefaultParagraphFont" style:family="text">
      <style:text-properties fo:language="tr" fo:country="TR" style:language-complex="ar" style:country-complex="SA"/>
    </style:style>
    <style:style style:name="T486" style:parent-style-name="DefaultParagraphFont" style:family="text">
      <style:text-properties fo:language="tr" fo:country="TR" style:language-complex="ar" style:country-complex="AE"/>
    </style:style>
    <style:style style:name="P487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88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8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name="P490" style:parent-style-name="Standard" style:family="paragraph">
      <style:paragraph-properties style:writing-mode="rl-tb"/>
    </style:style>
    <style:style style:name="T491" style:parent-style-name="DefaultParagraphFont" style:family="text">
      <style:text-properties style:font-name="Segoe UI Emoji" style:font-name-complex="Segoe UI Emoji" fo:font-weight="bold" style:font-weight-asian="bold" style:font-weight-complex="bold" fo:language="tr" fo:country="TR" style:language-complex="ar" style:country-complex="AE"/>
    </style:style>
    <style:style style:name="T49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9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94" style:parent-style-name="Standard" style:family="paragraph">
      <style:paragraph-properties style:writing-mode="rl-tb"/>
    </style:style>
    <style:style style:name="T49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49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49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498" style:parent-style-name="Standard" style:family="paragraph">
      <style:paragraph-properties style:writing-mode="rl-tb"/>
    </style:style>
    <style:style style:name="T49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0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0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02" style:parent-style-name="Standard" style:family="paragraph">
      <style:paragraph-properties style:writing-mode="rl-tb"/>
    </style:style>
    <style:style style:name="T50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0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0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06" style:parent-style-name="Standard" style:family="paragraph">
      <style:paragraph-properties style:writing-mode="rl-tb"/>
    </style:style>
    <style:style style:name="T507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08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09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10" style:parent-style-name="Standard" style:family="paragraph">
      <style:paragraph-properties style:writing-mode="rl-tb"/>
    </style:style>
    <style:style style:name="T511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12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13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14" style:parent-style-name="Standard" style:family="paragraph">
      <style:paragraph-properties style:writing-mode="rl-tb"/>
    </style:style>
    <style:style style:name="T515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16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17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18" style:parent-style-name="Standard" style:family="paragraph">
      <style:paragraph-properties style:writing-mode="rl-tb"/>
    </style:style>
    <style:style style:name="T519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20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21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22" style:parent-style-name="Standard" style:family="paragraph">
      <style:paragraph-properties style:writing-mode="rl-tb"/>
    </style:style>
    <style:style style:name="T523" style:parent-style-name="DefaultParagraphFont" style:family="text">
      <style:text-properties style:font-name="Segoe UI Symbol" style:font-name-complex="Segoe UI Symbol" fo:font-weight="bold" style:font-weight-asian="bold" style:font-weight-complex="bold" fo:language="tr" fo:country="TR" style:language-complex="ar" style:country-complex="AE"/>
    </style:style>
    <style:style style:name="T524" style:parent-style-name="DefaultParagraphFont" style:family="text">
      <style:text-properties fo:font-weight="bold" style:font-weight-asian="bold" style:font-weight-complex="bold" fo:language="tr" fo:country="TR" style:language-complex="ar" style:country-complex="AE"/>
    </style:style>
    <style:style style:name="T525" style:parent-style-name="DefaultParagraphFont" style:family="text">
      <style:text-properties fo:font-weight="bold" style:font-weight-asian="bold" style:font-weight-complex="bold" fo:language="tr" fo:country="TR" style:language-complex="ar" style:country-complex="SA"/>
    </style:style>
    <style:style style:name="P526" style:parent-style-name="Standard" style:family="paragraph">
      <style:paragraph-properties style:writing-mode="rl-tb"/>
    </style:style>
    <style:style style:name="T527" style:parent-style-name="DefaultParagraphFont" style:family="text">
      <style:text-properties fo:language="tr" fo:country="TR" style:language-complex="ar" style:country-complex="SA"/>
    </style:style>
    <style:style style:name="T528" style:parent-style-name="DefaultParagraphFont" style:family="text">
      <style:text-properties fo:language="tr" fo:country="TR" style:language-complex="ar" style:country-complex="AE"/>
    </style:style>
    <style:style style:name="P529" style:parent-style-name="Standard" style:family="paragraph">
      <style:paragraph-properties style:writing-mode="rl-tb"/>
      <style:text-properties fo:language="tr" fo:country="TR" style:language-complex="ar" style:country-complex="AE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<text:span text:style-name="T2">🎯</text:span><text:span text:style-name="T3"><text:s/></text:span><text:span text:style-name="T4">الخطة الرسمية للإعلان عن التوكن</text:span><text:span text:style-name="T5"><text:s/>(Token Announcement Strategy)</text:span><text:span text:style-name="T6"><text:line-break/></text:span></text:p>
      <text:p text:style-name="P7"><text:span text:style-name="T8">هذه الخطة هي التي ستحدد</text:span><text:span text:style-name="T9">:</text:span></text:p>
      <text:list text:style-name="LFO1" text:continue-numbering="true">
        <text:list-item>
          <text:p text:style-name="P10"><text:span text:style-name="T11">هل اللعبة ستنتشر؟</text:span></text:p>
        </text:list-item>
        <text:list-item>
          <text:p text:style-name="P12"><text:span text:style-name="T13">هل اللاعب سيعود يوميًا؟</text:span></text:p>
        </text:list-item>
        <text:list-item>
          <text:p text:style-name="P14"><text:span text:style-name="T15">هل سيجمع الناس؟</text:span></text:p>
        </text:list-item>
        <text:list-item>
          <text:p text:style-name="P16"><text:span text:style-name="T17">هل سيأتي اللاعبون الجدد؟</text:span></text:p>
        </text:list-item>
        <text:list-item>
          <text:p text:style-name="P18"><text:span text:style-name="T19">هل سيصبح المشروع “ترند”؟</text:span></text:p>
        </text:list-item>
        <text:list-item>
          <text:p text:style-name="P20"><text:span text:style-name="T21">هل ستصل إلى 50,000 – 100,000 لاعب؟</text:span></text:p>
        </text:list-item>
      </text:list>
      <text:p text:style-name="P22"><text:span text:style-name="T23">وهذه الخطة يجب أن تكون<text:s/></text:span><text:span text:style-name="T24">ذكية – قانونية – محفزة – واضحة – قوية</text:span><text:span text:style-name="T25">.</text:span></text:p>
      <text:p text:style-name="P26"><text:span text:style-name="T27">سأعطيك الخطة كاملة، خطوة بخطوة، بدون أي نقص، جاهزة للتنفيذ</text:span><text:span text:style-name="T28">.</text:span></text:p>
      <text:p text:style-name="P29"><text:span text:style-name="T30"><text:line-break/></text:span><text:span text:style-name="T31"><text:line-break/></text:span><text:span text:style-name="T32">أولًا: القاعدة الذهبية للإعلان عن التوكن</text:span></text:p>
      <text:p text:style-name="P33"><text:span text:style-name="T34">هناك خط رفيع جدًا بين</text:span><text:span text:style-name="T35">:</text:span></text:p>
      <text:p text:style-name="P36"><text:span text:style-name="T37">❌</text:span><text:span text:style-name="T38"><text:s/></text:span><text:span text:style-name="T39">الإعلان بطريقة تسبب مشاكل مع</text:span><text:span text:style-name="T40"><text:s/>Google / Apple<text:s/></text:span><text:span text:style-name="T41">✔</text:span><text:span text:style-name="T42"><text:s/></text:span><text:span text:style-name="T43">الإعلان بطريقة قانونية ومحفزة</text:span></text:p>
      <text:p text:style-name="P44"><text:span text:style-name="T45">الطريقة الصحيحة هي</text:span><text:span text:style-name="T46">:</text:span></text:p>
      <text:p text:style-name="P47"><text:span text:style-name="T48">✔</text:span><text:span text:style-name="T49"><text:s/></text:span><text:span text:style-name="T50">نعلن أن اللعبة لديها</text:span><text:span text:style-name="T51"><text:s/>Token</text:span></text:p>
      <text:p text:style-name="P52"><text:span text:style-name="T53">✔</text:span><text:span text:style-name="T54"><text:s/></text:span><text:span text:style-name="T55">نعلن أن التوكن سيصدر مستقبلًا</text:span></text:p>
      <text:p text:style-name="P56"><text:span text:style-name="T57">✔</text:span><text:span text:style-name="T58"><text:s/></text:span><text:span text:style-name="T59">نعلن أن التقدم داخل اللعبة سيؤثر على التوكن</text:span></text:p>
      <text:p text:style-name="P60"><text:span text:style-name="T61">✔</text:span><text:span text:style-name="T62"><text:s/></text:span><text:span text:style-name="T63">نعلن أن اللاعب يجمع “نقاط لها قيمة مستقبلية</text:span><text:span text:style-name="T64">”</text:span></text:p>
      <text:p text:style-name="P65"><text:span text:style-name="T66">❌</text:span><text:span text:style-name="T67"><text:s/></text:span><text:span text:style-name="T68">بدون وعود مالية</text:span></text:p>
      <text:p text:style-name="P69"><text:span text:style-name="T70">❌</text:span><text:span text:style-name="T71"><text:s/></text:span><text:span text:style-name="T72">بدون كلام عن أرباح</text:span></text:p>
      <text:p text:style-name="P73"><text:span text:style-name="T74">❌</text:span><text:span text:style-name="T75"><text:s/></text:span><text:span text:style-name="T76">بدون كلام عن استثمار</text:span></text:p>
      <text:p text:style-name="P77"><text:span text:style-name="T78">❌</text:span><text:span text:style-name="T79"><text:s/></text:span><text:span text:style-name="T80">بدون كلام عن “اربح المال الآن</text:span><text:span text:style-name="T81">”</text:span></text:p>
      <text:p text:style-name="P82"><text:span text:style-name="T83">هذه الطريقة استخدمتها</text:span><text:span text:style-name="T84">:</text:span></text:p>
      <text:list text:style-name="LFO2" text:continue-numbering="true">
        <text:list-item>
          <text:p text:style-name="P85">Notcoin</text:p>
        </text:list-item>
        <text:list-item>
          <text:p text:style-name="P86">Hamster</text:p>
        </text:list-item>
        <text:list-item>
          <text:p text:style-name="P87">TapSwap</text:p>
        </text:list-item>
        <text:list-item>
          <text:p text:style-name="P88">PixelTap</text:p>
        </text:list-item>
        <text:list-item>
          <text:p text:style-name="P89">Blum</text:p>
        </text:list-item>
        <text:list-item>
          <text:p text:style-name="P90">Catizen</text:p>
        </text:list-item>
      </text:list>
      <text:p text:style-name="P91"><text:span text:style-name="T92">ونجحت نجاحًا عالميًا</text:span><text:span text:style-name="T93">.</text:span></text:p>
      <text:p text:style-name="P94"/>
      <text:p text:style-name="P95"/>
      <text:p text:style-name="P96"/>
      <text:p text:style-name="P97"><text:span text:style-name="T98">⭐</text:span><text:span text:style-name="T99"><text:s/></text:span><text:span text:style-name="T100">ثانيًا: الرسالة الرسمية التي سنستخدمها داخل اللعبة</text:span></text:p>
      <text:p text:style-name="P101"><text:span text:style-name="T102">هذه الرسالة ستظهر في</text:span><text:span text:style-name="T103">:</text:span></text:p>
      <text:list text:style-name="LFO3" text:continue-numbering="true">
        <text:list-item>
          <text:p text:style-name="P104"><text:span text:style-name="T105">صفحة البداية</text:span></text:p>
        </text:list-item>
        <text:list-item>
          <text:p text:style-name="P106"><text:span text:style-name="T107">صفحة “عن اللعبة</text:span><text:span text:style-name="T108">”</text:span></text:p>
        </text:list-item>
        <text:list-item>
          <text:p text:style-name="P109"><text:span text:style-name="T110">صفحة “التوكن</text:span><text:span text:style-name="T111">”</text:span></text:p>
        </text:list-item>
        <text:list-item>
          <text:p text:style-name="P112"><text:span text:style-name="T113">صفحة “الأسئلة الشائعة</text:span><text:span text:style-name="T114">”</text:span></text:p>
        </text:list-item>
        <text:list-item>
          <text:p text:style-name="P115"><text:span text:style-name="T116">صفحة “المجتمع</text:span><text:span text:style-name="T117">”</text:span></text:p>
        </text:list-item>
      </text:list>
      <text:p text:style-name="P118"><text:span text:style-name="T119">النص الرسمي</text:span><text:span text:style-name="T120">:</text:span></text:p>
      <text:p text:style-name="P121"><text:span text:style-name="T122">TAPCO Token</text:span></text:p>
      <text:p text:style-name="P123"><text:span text:style-name="T124">لعبة</text:span><text:span text:style-name="T125"><text:s/>TAPCO<text:s/></text:span><text:span text:style-name="T126">تحتوي على نظام نقاط متقدم سيتم ربطه بتوكن</text:span><text:span text:style-name="T127"><text:s/>TAPCO<text:s/></text:span><text:span text:style-name="T128">عند إطلاقه مستقبلًا</text:span><text:span text:style-name="T129">.</text:span></text:p>
      <text:p text:style-name="P130"><text:span text:style-name="T131">التوكن غير متاح للتداول حاليًا، وسيتم إطلاقه فقط عندما يصبح المشروع جاهزًا، وبعد بناء مجتمع قوي واقتصاد متوازن</text:span><text:span text:style-name="T132">.</text:span></text:p>
      <text:p text:style-name="P133"><text:span text:style-name="T134">التقدم داخل اللعبة</text:span><text:span text:style-name="T135"><text:s/>(</text:span><text:span text:style-name="T136">النقاط</text:span><text:span text:style-name="T137"><text:s/>– XP –<text:s/></text:span><text:span text:style-name="T138">الإنجازات</text:span><text:span text:style-name="T139"><text:s/>– Prestige –<text:s/></text:span><text:span text:style-name="T140">المهمات اليومية</text:span><text:span text:style-name="T141">)<text:s/></text:span><text:span text:style-name="T142">سيؤثر على مكافآت<text:s/></text:span><text:soft-page-break/><text:span text:style-name="T143">التوكن عند الإطلاق</text:span><text:span text:style-name="T144">.</text:span></text:p>
      <text:p text:style-name="P145"><text:span text:style-name="T146">لا نعد بأي أرباح مالية. قيمة التوكن تعتمد على السوق عند الإطلاق</text:span><text:span text:style-name="T147">.</text:span></text:p>
      <text:p text:style-name="P148"><text:span text:style-name="T149">هذا النص</text:span><text:span text:style-name="T150">:</text:span></text:p>
      <text:p text:style-name="P151"><text:span text:style-name="T152">✔</text:span><text:span text:style-name="T153"><text:s/></text:span><text:span text:style-name="T154">قانوني<text:s/></text:span><text:span text:style-name="T155">✔</text:span><text:span text:style-name="T156"><text:s/></text:span><text:span text:style-name="T157">واضح<text:s/></text:span><text:span text:style-name="T158">✔</text:span><text:span text:style-name="T159"><text:s/></text:span><text:span text:style-name="T160">محفز<text:s/></text:span><text:span text:style-name="T161">✔</text:span><text:span text:style-name="T162"><text:s/></text:span><text:span text:style-name="T163">لا يخالف</text:span><text:span text:style-name="T164"><text:s/>Google / Apple<text:s/></text:span><text:span text:style-name="T165">✔</text:span><text:span text:style-name="T166"><text:s/></text:span><text:span text:style-name="T167">يعطي اللاعب هدف<text:s/></text:span><text:span text:style-name="T168">✔</text:span><text:span text:style-name="T169"><text:s/></text:span><text:span text:style-name="T170">يعطي اللاعب أمل<text:s/></text:span><text:span text:style-name="T171">✔</text:span><text:span text:style-name="T172"><text:s/></text:span><text:span text:style-name="T173">يعطي اللاعب دافع<text:s/></text:span><text:span text:style-name="T174">✔</text:span><text:span text:style-name="T175"><text:s/></text:span><text:span text:style-name="T176">يعطي اللاعب سبب للعودة يوميًا</text:span></text:p>
      <text:p text:style-name="P177"/>
      <text:p text:style-name="P178"/>
      <text:p text:style-name="P179"><text:span text:style-name="T180">⭐</text:span><text:span text:style-name="T181"><text:s/></text:span><text:span text:style-name="T182">ثالثًا: أين نضع الإعلان داخل اللعبة؟</text:span></text:p>
      <text:p text:style-name="P183"><text:span text:style-name="T184">1)<text:s/></text:span><text:span text:style-name="T185">شاشة البداية</text:span><text:span text:style-name="T186"><text:s/>(Splash Screen)</text:span></text:p>
      <text:p text:style-name="P187"><text:span text:style-name="T188">نضع جملة صغيرة</text:span><text:span text:style-name="T189">:</text:span></text:p>
      <text:p text:style-name="P190">“TAPCO Token Coming Soon”</text:p>
      <text:p text:style-name="P191"><text:span text:style-name="T192">2)<text:s/></text:span><text:span text:style-name="T193">صفحة خاصة داخل اللعبة اسمها</text:span><text:span text:style-name="T194">: TAPCO Token</text:span></text:p>
      <text:p text:style-name="P195"><text:span text:style-name="T196">تحتوي على</text:span><text:span text:style-name="T197">:</text:span></text:p>
      <text:list text:style-name="LFO4" text:continue-numbering="true">
        <text:list-item>
          <text:p text:style-name="P198"><text:span text:style-name="T199">ما هو التوكن؟</text:span></text:p>
        </text:list-item>
        <text:list-item>
          <text:p text:style-name="P200"><text:span text:style-name="T201">متى سيتم إطلاقه؟</text:span></text:p>
        </text:list-item>
        <text:list-item>
          <text:p text:style-name="P202"><text:span text:style-name="T203">كيف يتم حساب المكافآت؟</text:span></text:p>
        </text:list-item>
        <text:list-item>
          <text:p text:style-name="P204"><text:span text:style-name="T205">ما الذي يجمعه اللاعب الآن؟</text:span></text:p>
        </text:list-item>
        <text:list-item>
          <text:p text:style-name="P206"><text:span text:style-name="T207">لماذا يجب أن يلعب يوميًا؟</text:span></text:p>
        </text:list-item>
      </text:list>
      <text:p text:style-name="P208"><text:span text:style-name="T209">3)<text:s/></text:span><text:span text:style-name="T210">صفحة</text:span><text:span text:style-name="T211"><text:s/>“About”</text:span></text:p>
      <text:p text:style-name="P212"><text:span text:style-name="T213">نضع فقرة قصيرة عن التوكن</text:span><text:span text:style-name="T214">.</text:span></text:p>
      <text:p text:style-name="P215"><text:span text:style-name="T216">4)<text:s/></text:span><text:span text:style-name="T217">صفحة</text:span><text:span text:style-name="T218"><text:s/>“FAQ”</text:span></text:p>
      <text:p text:style-name="P219"><text:span text:style-name="T220">نضع أسئلة مثل</text:span><text:span text:style-name="T221">:</text:span></text:p>
      <text:list text:style-name="LFO5" text:continue-numbering="true">
        <text:list-item>
          <text:p text:style-name="P222"><text:span text:style-name="T223">هل التوكن متاح الآن؟</text:span></text:p>
        </text:list-item>
        <text:list-item>
          <text:p text:style-name="P224"><text:span text:style-name="T225">كيف أحصل على التوكن؟</text:span></text:p>
        </text:list-item>
        <text:list-item>
          <text:p text:style-name="P226"><text:span text:style-name="T227">هل يمكنني بيع التوكن؟</text:span></text:p>
        </text:list-item>
        <text:list-item>
          <text:p text:style-name="P228"><text:span text:style-name="T229">هل هناك تاريخ محدد للإطلاق؟</text:span></text:p>
        </text:list-item>
      </text:list>
      <text:p text:style-name="P230"><text:span text:style-name="T231">5)<text:s/></text:span><text:span text:style-name="T232">صفحة</text:span><text:span text:style-name="T233"><text:s/>“Community”</text:span></text:p>
      <text:p text:style-name="P234"><text:span text:style-name="T235">نضع روابط</text:span><text:span text:style-name="T236">:</text:span></text:p>
      <text:list text:style-name="LFO6" text:continue-numbering="true">
        <text:list-item>
          <text:p text:style-name="P237">Telegram</text:p>
        </text:list-item>
        <text:list-item>
          <text:p text:style-name="P238">Discord</text:p>
        </text:list-item>
        <text:list-item>
          <text:p text:style-name="P239">X (Twitter)</text:p>
        </text:list-item>
      </text:list>
      <text:p text:style-name="P240"/>
      <text:p text:style-name="P241"/>
      <text:p text:style-name="P242"><text:span text:style-name="T243">⭐</text:span><text:span text:style-name="T244"><text:s/></text:span><text:span text:style-name="T245">رابعًا: كيف نعلن عن التوكن خارج اللعبة؟</text:span></text:p>
      <text:p text:style-name="P246"><text:span text:style-name="T247">✔</text:span><text:span text:style-name="T248"><text:s/>1)<text:s/></text:span><text:span text:style-name="T249">حساب</text:span><text:span text:style-name="T250"><text:s/>X (Twitter)</text:span></text:p>
      <text:p text:style-name="P251"><text:span text:style-name="T252">نشر تغريدات مثل</text:span><text:span text:style-name="T253">:</text:span></text:p>
      <text:list text:style-name="LFO7" text:continue-numbering="true">
        <text:list-item>
          <text:p text:style-name="P254"><text:span text:style-name="T255">“TAPCO Token<text:s/></text:span><text:span text:style-name="T256">قادم قريبًا</text:span><text:span text:style-name="T257">”</text:span></text:p>
        </text:list-item>
        <text:list-item>
          <text:p text:style-name="P258"><text:span text:style-name="T259">“</text:span><text:span text:style-name="T260">اللعب الآن = مكافآت مستقبلية</text:span><text:span text:style-name="T261">”</text:span></text:p>
        </text:list-item>
        <text:list-item>
          <text:p text:style-name="P262"><text:span text:style-name="T263">“</text:span><text:span text:style-name="T264">اجمع نقاطك قبل الإطلاق</text:span><text:span text:style-name="T265">”</text:span></text:p>
        </text:list-item>
        <text:list-item>
          <text:p text:style-name="P266"><text:span text:style-name="T267">“</text:span><text:span text:style-name="T268">كل تقدم داخل اللعبة سيؤثر على مكافآت التوكن</text:span><text:span text:style-name="T269">”</text:span></text:p>
        </text:list-item>
      </text:list>
      <text:p text:style-name="P270"><text:span text:style-name="T271">✔</text:span><text:span text:style-name="T272"><text:s/>2)<text:s/></text:span><text:span text:style-name="T273">قناة</text:span><text:span text:style-name="T274"><text:s/>Telegram</text:span></text:p>
      <text:p text:style-name="P275"><text:span text:style-name="T276">نشر تحديثات أسبوعية</text:span><text:span text:style-name="T277">:</text:span></text:p>
      <text:list text:style-name="LFO8" text:continue-numbering="true">
        <text:list-item>
          <text:p text:style-name="P278"><text:span text:style-name="T279">“</text:span><text:span text:style-name="T280">تقدم التطوير</text:span><text:span text:style-name="T281">”</text:span></text:p>
        </text:list-item>
        <text:list-item>
          <text:p text:style-name="P282"><text:span text:style-name="T283">“</text:span><text:span text:style-name="T284">عدد اللاعبين</text:span><text:span text:style-name="T285">”</text:span></text:p>
        </text:list-item>
        <text:list-item>
          <text:p text:style-name="P286"><text:span text:style-name="T287">“</text:span><text:span text:style-name="T288">معلومات عن التوكن</text:span><text:span text:style-name="T289">”</text:span></text:p>
        </text:list-item>
        <text:list-item>
          <text:p text:style-name="P290"><text:span text:style-name="T291">“</text:span><text:span text:style-name="T292">تلميحات عن الإطلاق</text:span><text:span text:style-name="T293">”</text:span></text:p>
        </text:list-item>
      </text:list>
      <text:p text:style-name="P294"><text:span text:style-name="T295">✔</text:span><text:span text:style-name="T296"><text:s/>3) Discord</text:span></text:p>
      <text:p text:style-name="P297"><text:span text:style-name="T298">للمجتمع النشط</text:span><text:span text:style-name="T299">.</text:span></text:p>
      <text:p text:style-name="P300"><text:span text:style-name="T301">✔</text:span><text:span text:style-name="T302"><text:s/>4)<text:s/></text:span><text:span text:style-name="T303">فيديوهات</text:span><text:span text:style-name="T304"><text:s/>TikTok</text:span></text:p>
      <text:soft-page-break/>
      <text:p text:style-name="P305"><text:span text:style-name="T306">أقوى منصة للنمو</text:span><text:span text:style-name="T307">.</text:span></text:p>
      <text:p text:style-name="P308"/>
      <text:p text:style-name="P309"/>
      <text:p text:style-name="P310"/>
      <text:p text:style-name="P311"><text:span text:style-name="T312">⭐</text:span><text:span text:style-name="T313"><text:s/></text:span><text:span text:style-name="T314">خامسًا: كيف نخلق</text:span><text:span text:style-name="T315"><text:s/>“Hype”<text:s/></text:span><text:span text:style-name="T316">قبل الإطلاق؟</text:span></text:p>
      <text:p text:style-name="P317"><text:span text:style-name="T318">1)<text:s/></text:span><text:span text:style-name="T319">عدّاد تنازلي</text:span><text:span text:style-name="T320"><text:s/>(Countdown)</text:span></text:p>
      <text:p text:style-name="P321"><text:span text:style-name="T322">لكن ليس لإطلاق التوكن</text:span><text:span text:style-name="T323">…<text:s/></text:span><text:span text:style-name="T324">بل لإطلاق اللعبة نفسها</text:span><text:span text:style-name="T325">.</text:span></text:p>
      <text:p text:style-name="P326"><text:span text:style-name="T327">2)<text:s/></text:span><text:span text:style-name="T328">نظام الإحالات</text:span></text:p>
      <text:p text:style-name="P329"><text:span text:style-name="T330">كل إحالة = نقاط إضافية النقاط = مكافآت توكن مستقبلية</text:span></text:p>
      <text:p text:style-name="P331"><text:span text:style-name="T332">3)<text:s/></text:span><text:span text:style-name="T333">أحداث أسبوعية</text:span></text:p>
      <text:p text:style-name="P334"><text:span text:style-name="T335">مثل</text:span><text:span text:style-name="T336">:</text:span></text:p>
      <text:list text:style-name="LFO9" text:continue-numbering="true">
        <text:list-item>
          <text:p text:style-name="P337">Double XP</text:p>
        </text:list-item>
        <text:list-item>
          <text:p text:style-name="P338">Boost Sale</text:p>
        </text:list-item>
        <text:list-item>
          <text:p text:style-name="P339">Prestige Day</text:p>
        </text:list-item>
      </text:list>
      <text:p text:style-name="P340"><text:span text:style-name="T341">4)<text:s/></text:span><text:span text:style-name="T342">إنجازات خاصة بالتوكن</text:span></text:p>
      <text:p text:style-name="P343"><text:span text:style-name="T344">مثل</text:span><text:span text:style-name="T345">:</text:span></text:p>
      <text:list text:style-name="LFO10" text:continue-numbering="true">
        <text:list-item>
          <text:p text:style-name="P346">“Token Pioneer”</text:p>
        </text:list-item>
        <text:list-item>
          <text:p text:style-name="P347">“Early Supporter”</text:p>
        </text:list-item>
        <text:list-item>
          <text:p text:style-name="P348">“Genesis Player”</text:p>
        </text:list-item>
      </text:list>
      <text:p text:style-name="P349"><text:span text:style-name="T350">5) Badges<text:s/></text:span><text:span text:style-name="T351">نادرة</text:span></text:p>
      <text:p text:style-name="P352"><text:span text:style-name="T353">الناس تعشق الندرة</text:span><text:span text:style-name="T354">.</text:span></text:p>
      <text:p text:style-name="P355"/>
      <text:p text:style-name="P356"/>
      <text:p text:style-name="P357"/>
      <text:p text:style-name="P358"><text:span text:style-name="T359">⭐</text:span><text:span text:style-name="T360"><text:s/></text:span><text:span text:style-name="T361">سادسًا: كيف نربط النقاط بالتوكن بدون أن نكسر الاقتصاد؟</text:span></text:p>
      <text:p text:style-name="P362"><text:span text:style-name="T363">هذه النقطة مهمة جدًا، وسنشرحها بالتفصيل في<text:s/></text:span><text:span text:style-name="T364">الخطة رقم 2</text:span><text:span text:style-name="T365">.</text:span></text:p>
      <text:p text:style-name="P366"><text:span text:style-name="T367">لكن باختصار</text:span><text:span text:style-name="T368">:</text:span></text:p>
      <text:list text:style-name="LFO11" text:continue-numbering="true">
        <text:list-item>
          <text:p text:style-name="P369"><text:span text:style-name="T370">النقاط</text:span><text:span text:style-name="T371"><text:s/>= Score</text:span></text:p>
        </text:list-item>
        <text:list-item>
          <text:p text:style-name="P372">XP = Progress</text:p>
        </text:list-item>
        <text:list-item>
          <text:p text:style-name="P373">Prestige = Multiplier</text:p>
        </text:list-item>
        <text:list-item>
          <text:p text:style-name="P374"><text:span text:style-name="T375">الإنجازات</text:span><text:span text:style-name="T376"><text:s/>= Bonus</text:span></text:p>
        </text:list-item>
        <text:list-item>
          <text:p text:style-name="P377"><text:span text:style-name="T378">المهمات اليومية</text:span><text:span text:style-name="T379"><text:s/>= Daily Activity</text:span></text:p>
        </text:list-item>
        <text:list-item>
          <text:p text:style-name="P380"><text:span text:style-name="T381">الأحداث</text:span><text:span text:style-name="T382"><text:s/>= Seasonal Boost</text:span></text:p>
        </text:list-item>
      </text:list>
      <text:p text:style-name="P383"><text:span text:style-name="T384">وعند إطلاق التوكن</text:span><text:span text:style-name="T385">:</text:span></text:p>
      <text:p text:style-name="P386"><draw:frame draw:style-name="a0" text:anchor-type="as-char" svg:x="0in" svg:y="0in" svg:width="6.2in" svg:height="0.19167in" style:rel-width="scale" style:rel-height="scale"><draw:object xlink:href="Object 1/" xlink:type="simple" xlink:show="embed" xlink:actuate="onLoad"/></draw:frame></text:p>
      <text:p text:style-name="P387">بدون أي تضخم بدون أي انهيار بدون أي مشاكل</text:p>
      <text:p text:style-name="P388"/>
      <text:p text:style-name="P389"/>
      <text:p text:style-name="P390"/>
      <text:p text:style-name="P391"><text:span text:style-name="T392">⭐</text:span><text:span text:style-name="T393"><text:s/></text:span><text:span text:style-name="T394">سابعًا: متى نعلن عن التوكن؟</text:span></text:p>
      <text:p text:style-name="P395"><text:span text:style-name="T396">✔</text:span><text:span text:style-name="T397"><text:s/></text:span><text:span text:style-name="T398">قبل إطلاق اللعبة</text:span></text:p>
      <text:p text:style-name="P399"><text:span text:style-name="T400">نعم</text:span><text:span text:style-name="T401">.</text:span></text:p>
      <text:p text:style-name="P402"><text:span text:style-name="T403">✔</text:span><text:span text:style-name="T404"><text:s/></text:span><text:span text:style-name="T405">أثناء الإطلاق</text:span></text:p>
      <text:p text:style-name="P406"><text:span text:style-name="T407">نعم</text:span><text:span text:style-name="T408">.</text:span></text:p>
      <text:p text:style-name="P409"><text:span text:style-name="T410">✔</text:span><text:span text:style-name="T411"><text:s/></text:span><text:span text:style-name="T412">بعد الإطلاق</text:span></text:p>
      <text:p text:style-name="P413"><text:span text:style-name="T414">نعم</text:span><text:span text:style-name="T415">.</text:span></text:p>
      <text:p text:style-name="P416"><text:span text:style-name="T417">✔</text:span><text:span text:style-name="T418"><text:s/></text:span><text:span text:style-name="T419">قبل إطلاق التوكن</text:span></text:p>
      <text:p text:style-name="P420"><text:span text:style-name="T421">نعم</text:span><text:span text:style-name="T422">.</text:span></text:p>
      <text:p text:style-name="P423"><text:span text:style-name="T424">الإعلان يجب أن يكون<text:s/></text:span><text:span text:style-name="T425">مستمرًا</text:span><text:span text:style-name="T426">.</text:span></text:p>
      <text:soft-page-break/>
      <text:p text:style-name="P427"><text:span text:style-name="T428">⭐</text:span><text:span text:style-name="T429"><text:s/></text:span><text:span text:style-name="T430">ثامنًا: هل الإعلان عن التوكن سيجلب لاعبين؟</text:span></text:p>
      <text:p text:style-name="P431"><text:span text:style-name="T432">نعم</text:span><text:span text:style-name="T433">…<text:s/></text:span><text:span text:style-name="T434">وهذا هو السبب</text:span><text:span text:style-name="T435">:</text:span></text:p>
      <text:p text:style-name="P436"><text:span text:style-name="T437">✔</text:span><text:span text:style-name="T438"><text:s/></text:span><text:span text:style-name="T439">الناس تبحث عن فرصة</text:span></text:p>
      <text:p text:style-name="P440"><text:span text:style-name="T441">✔</text:span><text:span text:style-name="T442"><text:s/></text:span><text:span text:style-name="T443">الناس تبحث عن دخل</text:span></text:p>
      <text:p text:style-name="P444"><text:span text:style-name="T445">✔</text:span><text:span text:style-name="T446"><text:s/></text:span><text:span text:style-name="T447">الناس تبحث عن أمل</text:span></text:p>
      <text:p text:style-name="P448"><text:span text:style-name="T449">✔</text:span><text:span text:style-name="T450"><text:s/></text:span><text:span text:style-name="T451">الناس تبحث عن مشروع جديد</text:span></text:p>
      <text:p text:style-name="P452"><text:span text:style-name="T453">✔</text:span><text:span text:style-name="T454"><text:s/></text:span><text:span text:style-name="T455">الناس تبحث عن</text:span><text:span text:style-name="T456"><text:s/>“Next Notcoin”</text:span></text:p>
      <text:p text:style-name="P457"><text:span text:style-name="T458">✔</text:span><text:span text:style-name="T459"><text:s/></text:span><text:span text:style-name="T460">الناس تبحث عن</text:span><text:span text:style-name="T461"><text:s/>“Next Hamster”</text:span></text:p>
      <text:p text:style-name="P462"><text:span text:style-name="T463">✔</text:span><text:span text:style-name="T464"><text:s/></text:span><text:span text:style-name="T465">الناس تبحث عن</text:span><text:span text:style-name="T466"><text:s/>“Next TapSwap”</text:span></text:p>
      <text:p text:style-name="P467"><text:span text:style-name="T468">وأنت تقدم لهم</text:span><text:span text:style-name="T469">:</text:span></text:p>
      <text:list text:style-name="LFO12" text:continue-numbering="true">
        <text:list-item>
          <text:p text:style-name="P470"><text:span text:style-name="T471">لعبة</text:span></text:p>
        </text:list-item>
        <text:list-item>
          <text:p text:style-name="P472"><text:span text:style-name="T473">تقدم</text:span></text:p>
        </text:list-item>
        <text:list-item>
          <text:p text:style-name="P474"><text:span text:style-name="T475">نظام</text:span></text:p>
        </text:list-item>
        <text:list-item>
          <text:p text:style-name="P476"><text:span text:style-name="T477">اقتصاد</text:span></text:p>
        </text:list-item>
        <text:list-item>
          <text:p text:style-name="P478"><text:span text:style-name="T479">مجتمع</text:span></text:p>
        </text:list-item>
        <text:list-item>
          <text:p text:style-name="P480"><text:span text:style-name="T481">توكن</text:span></text:p>
        </text:list-item>
        <text:list-item>
          <text:p text:style-name="P482"><text:span text:style-name="T483">مستقبل</text:span></text:p>
        </text:list-item>
      </text:list>
      <text:p text:style-name="P484"><text:span text:style-name="T485">وهذا هو ما يجعل اللعبة تنتشر</text:span><text:span text:style-name="T486">.</text:span></text:p>
      <text:p text:style-name="P487"/>
      <text:p text:style-name="P488"/>
      <text:p text:style-name="P489"/>
      <text:p text:style-name="P490"><text:span text:style-name="T491">⭐</text:span><text:span text:style-name="T492"><text:s/></text:span><text:span text:style-name="T493">تاسعًا: الخلاصة النهائية</text:span></text:p>
      <text:p text:style-name="P494"><text:span text:style-name="T495">✔</text:span><text:span text:style-name="T496"><text:s/></text:span><text:span text:style-name="T497">نعم، يجب الإعلان عن التوكن</text:span></text:p>
      <text:p text:style-name="P498"><text:span text:style-name="T499">✔</text:span><text:span text:style-name="T500"><text:s/></text:span><text:span text:style-name="T501">نعم، هذا سيجذب اللاعبين</text:span></text:p>
      <text:p text:style-name="P502"><text:span text:style-name="T503">✔</text:span><text:span text:style-name="T504"><text:s/></text:span><text:span text:style-name="T505">نعم، هذا سيجعل اللعبة تنمو</text:span></text:p>
      <text:p text:style-name="P506"><text:span text:style-name="T507">✔</text:span><text:span text:style-name="T508"><text:s/></text:span><text:span text:style-name="T509">نعم، هذا سيجعل الناس تلعب يوميًا</text:span></text:p>
      <text:p text:style-name="P510"><text:span text:style-name="T511">✔</text:span><text:span text:style-name="T512"><text:s/></text:span><text:span text:style-name="T513">نعم، هذا سيجعل الناس تجمع</text:span></text:p>
      <text:p text:style-name="P514"><text:span text:style-name="T515">✔</text:span><text:span text:style-name="T516"><text:s/></text:span><text:span text:style-name="T517">نعم، هذا سيجعل الناس تدعو أصدقاء</text:span></text:p>
      <text:p text:style-name="P518"><text:span text:style-name="T519">✔</text:span><text:span text:style-name="T520"><text:s/></text:span><text:span text:style-name="T521">نعم، هذا سيجعل اللعبة لا تموت</text:span></text:p>
      <text:p text:style-name="P522"><text:span text:style-name="T523">✔</text:span><text:span text:style-name="T524"><text:s/></text:span><text:span text:style-name="T525">نعم، هذا هو الطريق الصحيح</text:span></text:p>
      <text:p text:style-name="P526"><text:span text:style-name="T527">وأنت الآن في الطريق الصحيح 100</text:span><text:span text:style-name="T528">%.</text:span></text:p>
      <text:p text:style-name="P5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aydan Najjar</dc:creator>
    <meta:creation-date>2009-04-16T11:32:00Z</meta:creation-date>
    <dc:date>2026-04-20T09:12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03" meta:character-count="4034" meta:row-count="28" meta:non-whitespace-character-count="3439"/>
  </office:meta>
</office:document-meta>
</file>

<file path=Object 1/content.xml><?xml version="1.0" encoding="utf-8"?>
<math xmlns="http://www.w3.org/1998/Math/MathML">
  <mi>T</mi>
  <mi>o</mi>
  <mi>k</mi>
  <mi>e</mi>
  <mi>n</mi>
  <mi>R</mi>
  <mi>e</mi>
  <mi>w</mi>
  <mi>a</mi>
  <mi>r</mi>
  <mi>d</mi>
  <mo>=</mo>
  <mo>(</mo>
  <mi>T</mi>
  <mi>o</mi>
  <mi>t</mi>
  <mi>a</mi>
  <mi>l</mi>
  <mi>S</mi>
  <mi>c</mi>
  <mi>o</mi>
  <mi>r</mi>
  <mi>e</mi>
  <mo>×</mo>
  <mi>P</mi>
  <mi>r</mi>
  <mi>e</mi>
  <mi>s</mi>
  <mi>t</mi>
  <mi>i</mi>
  <mi>g</mi>
  <mi>e</mi>
  <mi>M</mi>
  <mi>u</mi>
  <mi>l</mi>
  <mi>t</mi>
  <mi>i</mi>
  <mi>p</mi>
  <mi>l</mi>
  <mi>i</mi>
  <mi>e</mi>
  <mi>r</mi>
  <mo>×</mo>
  <mi>A</mi>
  <mi>c</mi>
  <mi>t</mi>
  <mi>i</mi>
  <mi>v</mi>
  <mi>i</mi>
  <mi>t</mi>
  <mi>y</mi>
  <mi>S</mi>
  <mi>c</mi>
  <mi>o</mi>
  <mi>r</mi>
  <mi>e</mi>
  <mo>×</mo>
  <mi>R</mi>
  <mi>a</mi>
  <mi>r</mi>
  <mi>i</mi>
  <mi>t</mi>
  <mi>y</mi>
  <mi>B</mi>
  <mi>o</mi>
  <mi>n</mi>
  <mi>u</mi>
  <mi>s</mi>
  <mo>)</mo>
</math>
</file>